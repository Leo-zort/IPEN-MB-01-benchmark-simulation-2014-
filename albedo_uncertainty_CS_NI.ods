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13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CS (Carbon Steel)" table:style-name="ta1">
        <table:table-column table:style-name="co1" table:number-columns-repeated="26" table:default-cell-style-name="ce2"/>
        <table:table-row table:style-name="ro1">
          <table:table-cell table:style-name="ce1" office:value-type="string" calcext:value-type="string">
            <text:p>Simulation ID</text:p>
          </table:table-cell>
          <table:table-cell table:style-name="ce1" office:value-type="string" calcext:value-type="string">
            <text:p>Thickness (cm)</text:p>
          </table:table-cell>
          <table:table-cell table:style-name="ce1" office:value-type="string" calcext:value-type="string">
            <text:p>J+_thermal</text:p>
          </table:table-cell>
          <table:table-cell table:style-name="ce1" office:value-type="string" calcext:value-type="string">
            <text:p>R(J+_thermal)</text:p>
          </table:table-cell>
          <table:table-cell table:style-name="ce1" office:value-type="string" calcext:value-type="string">
            <text:p>J+_epithermal</text:p>
          </table:table-cell>
          <table:table-cell table:style-name="ce1" office:value-type="string" calcext:value-type="string">
            <text:p>R(J+_epithermal)</text:p>
          </table:table-cell>
          <table:table-cell table:style-name="ce1" office:value-type="string" calcext:value-type="string">
            <text:p>J+_fast</text:p>
          </table:table-cell>
          <table:table-cell table:style-name="ce1" office:value-type="string" calcext:value-type="string">
            <text:p>R(J+_fast)</text:p>
          </table:table-cell>
          <table:table-cell table:style-name="ce1" office:value-type="string" calcext:value-type="string">
            <text:p>J+_total</text:p>
          </table:table-cell>
          <table:table-cell table:style-name="ce1" office:value-type="string" calcext:value-type="string">
            <text:p>R(J+_total)</text:p>
          </table:table-cell>
          <table:table-cell table:style-name="ce1" office:value-type="string" calcext:value-type="string">
            <text:p>J-_thermal</text:p>
          </table:table-cell>
          <table:table-cell table:style-name="ce1" office:value-type="string" calcext:value-type="string">
            <text:p>R(J-_thermal)</text:p>
          </table:table-cell>
          <table:table-cell table:style-name="ce1" office:value-type="string" calcext:value-type="string">
            <text:p>J-_epithermal</text:p>
          </table:table-cell>
          <table:table-cell table:style-name="ce1" office:value-type="string" calcext:value-type="string">
            <text:p>R(J-_epithermal)</text:p>
          </table:table-cell>
          <table:table-cell table:style-name="ce1" office:value-type="string" calcext:value-type="string">
            <text:p>J-_fast</text:p>
          </table:table-cell>
          <table:table-cell table:style-name="ce1" office:value-type="string" calcext:value-type="string">
            <text:p>R(J-_fast)</text:p>
          </table:table-cell>
          <table:table-cell table:style-name="ce1" office:value-type="string" calcext:value-type="string">
            <text:p>J-_total</text:p>
          </table:table-cell>
          <table:table-cell table:style-name="ce1" office:value-type="string" calcext:value-type="string">
            <text:p>R(J-_total)</text:p>
          </table:table-cell>
          <table:table-cell table:style-name="ce1" office:value-type="string" calcext:value-type="string">
            <text:p>alpha_thermal</text:p>
          </table:table-cell>
          <table:table-cell table:style-name="ce1" office:value-type="string" calcext:value-type="string">
            <text:p>sigma(alpha_thermal)</text:p>
          </table:table-cell>
          <table:table-cell table:style-name="ce1" office:value-type="string" calcext:value-type="string">
            <text:p>alpha_epithermal</text:p>
          </table:table-cell>
          <table:table-cell table:style-name="ce1" office:value-type="string" calcext:value-type="string">
            <text:p>sigma(alpha_epithermal)</text:p>
          </table:table-cell>
          <table:table-cell table:style-name="ce1" office:value-type="string" calcext:value-type="string">
            <text:p>alpha_fast</text:p>
          </table:table-cell>
          <table:table-cell table:style-name="ce1" office:value-type="string" calcext:value-type="string">
            <text:p>sigma(alpha_fast)</text:p>
          </table:table-cell>
          <table:table-cell table:style-name="ce1" office:value-type="string" calcext:value-type="string">
            <text:p>alpha_total</text:p>
          </table:table-cell>
          <table:table-cell table:style-name="ce1" office:value-type="string" calcext:value-type="string">
            <text:p>sigma(alpha_total)</text:p>
          </table:table-cell>
        </table:table-row>
        <table:table-row table:style-name="ro1">
          <table:table-cell table:style-name="ce1" office:value-type="string" calcext:value-type="string">
            <text:p>CS_00</text:p>
          </table:table-cell>
          <table:table-cell table:style-name="ce1" office:value-type="float" office:value="0.00001" calcext:value-type="float">
            <text:p>0.00001</text:p>
          </table:table-cell>
          <table:table-cell table:style-name="ce3" office:value-type="float" office:value="0.0477725" calcext:value-type="float">
            <text:p>4.78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294252" calcext:value-type="float">
            <text:p>2.94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3" office:value-type="float" office:value="0.0514195" calcext:value-type="float">
            <text:p>5.14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128617" calcext:value-type="float">
            <text:p>1.29E-01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553685" calcext:value-type="float">
            <text:p>5.54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3" office:value-type="float" office:value="0.0180825" calcext:value-type="float">
            <text:p>1.81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0710153" calcext:value-type="float">
            <text:p>7.10E-03</text:p>
          </table:table-cell>
          <table:table-cell table:style-name="ce3" office:value-type="float" office:value="0.0008" calcext:value-type="float">
            <text:p>8.00E-04</text:p>
          </table:table-cell>
          <table:table-cell table:style-name="ce3" office:value-type="float" office:value="0.0805525" calcext:value-type="float">
            <text:p>8.06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2]/[.I2]" office:value-type="percentage" office:value="0.430491303637933" calcext:value-type="percentage">
            <text:p>43.05%</text:p>
          </table:table-cell>
          <table:table-cell table:style-name="ce4" table:formula="of:=[.S2]*SQRT([.L2]^2+[.J2]^2)" office:value-type="percentage" office:value="0.000215245651818966" calcext:value-type="percentage">
            <text:p>0.02%</text:p>
          </table:table-cell>
          <table:table-cell table:style-name="ce4" table:formula="of:=[.M2]/[.I2]" office:value-type="percentage" office:value="0.140591834671933" calcext:value-type="percentage">
            <text:p>14.06%</text:p>
          </table:table-cell>
          <table:table-cell table:style-name="ce4" table:formula="of:=[.U2]*SQRT([.N2]^2+[.J2]^2)" office:value-type="percentage" office:value="0.0000943118698223562" calcext:value-type="percentage">
            <text:p>0.01%</text:p>
          </table:table-cell>
          <table:table-cell table:style-name="ce4" table:formula="of:=[.O2]/[.I2]" office:value-type="percentage" office:value="0.0552145517311086" calcext:value-type="percentage">
            <text:p>5.52%</text:p>
          </table:table-cell>
          <table:table-cell table:style-name="ce4" table:formula="of:=[.W2]*SQRT([.P2]^2+[.J2]^2)" office:value-type="percentage" office:value="0.0000471753336786621" calcext:value-type="percentage">
            <text:p>0.00%</text:p>
          </table:table-cell>
          <table:table-cell table:style-name="ce4" table:formula="of:=[.Q2]/[.I2]" office:value-type="percentage" office:value="0.626297456790315" calcext:value-type="percentage">
            <text:p>62.63%</text:p>
          </table:table-cell>
          <table:table-cell table:style-name="ce4" table:formula="of:=[.Y2]*SQRT([.R2]^2+[.J2]^2)" office:value-type="percentage" office:value="0.000313148728395158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CS_01</text:p>
          </table:table-cell>
          <table:table-cell table:style-name="ce1" office:value-type="float" office:value="0.3367" calcext:value-type="float">
            <text:p>0.3367</text:p>
          </table:table-cell>
          <table:table-cell table:style-name="ce3" office:value-type="float" office:value="0.0346373" calcext:value-type="float">
            <text:p>3.46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281663" calcext:value-type="float">
            <text:p>2.82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73858" calcext:value-type="float">
            <text:p>4.74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110189" calcext:value-type="float">
            <text:p>1.10E-01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361793" calcext:value-type="float">
            <text:p>3.62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3" office:value-type="float" office:value="0.0176738" calcext:value-type="float">
            <text:p>1.77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0804577" calcext:value-type="float">
            <text:p>8.05E-03</text:p>
          </table:table-cell>
          <table:table-cell table:style-name="ce3" office:value-type="float" office:value="0.0008" calcext:value-type="float">
            <text:p>8.00E-04</text:p>
          </table:table-cell>
          <table:table-cell table:style-name="ce3" office:value-type="float" office:value="0.0618989" calcext:value-type="float">
            <text:p>6.19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3]/[.I3]" office:value-type="percentage" office:value="0.328338581891114" calcext:value-type="percentage">
            <text:p>32.83%</text:p>
          </table:table-cell>
          <table:table-cell table:style-name="ce4" table:formula="of:=[.S3]*SQRT([.L3]^2+[.J3]^2)" office:value-type="percentage" office:value="0.000164169290945557" calcext:value-type="percentage">
            <text:p>0.02%</text:p>
          </table:table-cell>
          <table:table-cell table:style-name="ce4" table:formula="of:=[.M3]/[.I3]" office:value-type="percentage" office:value="0.160395320767046" calcext:value-type="percentage">
            <text:p>16.04%</text:p>
          </table:table-cell>
          <table:table-cell table:style-name="ce4" table:formula="of:=[.U3]*SQRT([.N3]^2+[.J3]^2)" office:value-type="percentage" office:value="0.000107596452152399" calcext:value-type="percentage">
            <text:p>0.01%</text:p>
          </table:table-cell>
          <table:table-cell table:style-name="ce4" table:formula="of:=[.O3]/[.I3]" office:value-type="percentage" office:value="0.0730179055985625" calcext:value-type="percentage">
            <text:p>7.30%</text:p>
          </table:table-cell>
          <table:table-cell table:style-name="ce4" table:formula="of:=[.W3]*SQRT([.P3]^2+[.J3]^2)" office:value-type="percentage" office:value="0.000062386525890936" calcext:value-type="percentage">
            <text:p>0.01%</text:p>
          </table:table-cell>
          <table:table-cell table:style-name="ce4" table:formula="of:=[.Q3]/[.I3]" office:value-type="percentage" office:value="0.561752080516204" calcext:value-type="percentage">
            <text:p>56.18%</text:p>
          </table:table-cell>
          <table:table-cell table:style-name="ce4" table:formula="of:=[.Y3]*SQRT([.R3]^2+[.J3]^2)" office:value-type="percentage" office:value="0.000280876040258102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CS_02</text:p>
          </table:table-cell>
          <table:table-cell table:style-name="ce1" office:value-type="float" office:value="0.6734" calcext:value-type="float">
            <text:p>0.6734</text:p>
          </table:table-cell>
          <table:table-cell table:style-name="ce3" office:value-type="float" office:value="0.0285573" calcext:value-type="float">
            <text:p>2.86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278066" calcext:value-type="float">
            <text:p>2.78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55742" calcext:value-type="float">
            <text:p>4.56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101938" calcext:value-type="float">
            <text:p>1.02E-01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269831" calcext:value-type="float">
            <text:p>2.70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178708" calcext:value-type="float">
            <text:p>1.79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0898095" calcext:value-type="float">
            <text:p>8.98E-03</text:p>
          </table:table-cell>
          <table:table-cell table:style-name="ce3" office:value-type="float" office:value="0.0008" calcext:value-type="float">
            <text:p>8.00E-04</text:p>
          </table:table-cell>
          <table:table-cell table:style-name="ce3" office:value-type="float" office:value="0.0538349" calcext:value-type="float">
            <text:p>5.38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4]/[.I4]" office:value-type="percentage" office:value="0.264701092821127" calcext:value-type="percentage">
            <text:p>26.47%</text:p>
          </table:table-cell>
          <table:table-cell table:style-name="ce4" table:formula="of:=[.S4]*SQRT([.L4]^2+[.J4]^2)" office:value-type="percentage" office:value="0.000154345933875297" calcext:value-type="percentage">
            <text:p>0.02%</text:p>
          </table:table-cell>
          <table:table-cell table:style-name="ce4" table:formula="of:=[.M4]/[.I4]" office:value-type="percentage" office:value="0.175310482842512" calcext:value-type="percentage">
            <text:p>17.53%</text:p>
          </table:table-cell>
          <table:table-cell table:style-name="ce4" table:formula="of:=[.U4]*SQRT([.N4]^2+[.J4]^2)" office:value-type="percentage" office:value="0.00011760184704125" calcext:value-type="percentage">
            <text:p>0.01%</text:p>
          </table:table-cell>
          <table:table-cell table:style-name="ce4" table:formula="of:=[.O4]/[.I4]" office:value-type="percentage" office:value="0.0881020816574781" calcext:value-type="percentage">
            <text:p>8.81%</text:p>
          </table:table-cell>
          <table:table-cell table:style-name="ce4" table:formula="of:=[.W4]*SQRT([.P4]^2+[.J4]^2)" office:value-type="percentage" office:value="0.0000752744515651764" calcext:value-type="percentage">
            <text:p>0.01%</text:p>
          </table:table-cell>
          <table:table-cell table:style-name="ce4" table:formula="of:=[.Q4]/[.I4]" office:value-type="percentage" office:value="0.528114147815339" calcext:value-type="percentage">
            <text:p>52.81%</text:p>
          </table:table-cell>
          <table:table-cell table:style-name="ce4" table:formula="of:=[.Y4]*SQRT([.R4]^2+[.J4]^2)" office:value-type="percentage" office:value="0.000264057073907669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CS_03</text:p>
          </table:table-cell>
          <table:table-cell table:style-name="ce1" office:value-type="float" office:value="1.0101" calcext:value-type="float">
            <text:p>1.0101</text:p>
          </table:table-cell>
          <table:table-cell table:style-name="ce3" office:value-type="float" office:value="0.0251664" calcext:value-type="float">
            <text:p>2.52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278499" calcext:value-type="float">
            <text:p>2.78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47664" calcext:value-type="float">
            <text:p>4.48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977827" calcext:value-type="float">
            <text:p>9.78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216495" calcext:value-type="float">
            <text:p>2.16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182866" calcext:value-type="float">
            <text:p>1.83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0989635" calcext:value-type="float">
            <text:p>9.90E-03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498325" calcext:value-type="float">
            <text:p>4.98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5]/[.I5]" office:value-type="percentage" office:value="0.221404195220627" calcext:value-type="percentage">
            <text:p>22.14%</text:p>
          </table:table-cell>
          <table:table-cell table:style-name="ce4" table:formula="of:=[.S5]*SQRT([.L5]^2+[.J5]^2)" office:value-type="percentage" office:value="0.000129099721164841" calcext:value-type="percentage">
            <text:p>0.01%</text:p>
          </table:table-cell>
          <table:table-cell table:style-name="ce4" table:formula="of:=[.M5]/[.I5]" office:value-type="percentage" office:value="0.187012631068686" calcext:value-type="percentage">
            <text:p>18.70%</text:p>
          </table:table-cell>
          <table:table-cell table:style-name="ce4" table:formula="of:=[.U5]*SQRT([.N5]^2+[.J5]^2)" office:value-type="percentage" office:value="0.000125451886716201" calcext:value-type="percentage">
            <text:p>0.01%</text:p>
          </table:table-cell>
          <table:table-cell table:style-name="ce4" table:formula="of:=[.O5]/[.I5]" office:value-type="percentage" office:value="0.101207575573184" calcext:value-type="percentage">
            <text:p>10.12%</text:p>
          </table:table-cell>
          <table:table-cell table:style-name="ce4" table:formula="of:=[.W5]*SQRT([.P5]^2+[.J5]^2)" office:value-type="percentage" office:value="0.0000770773932159945" calcext:value-type="percentage">
            <text:p>0.01%</text:p>
          </table:table-cell>
          <table:table-cell table:style-name="ce4" table:formula="of:=[.Q5]/[.I5]" office:value-type="percentage" office:value="0.509624913200392" calcext:value-type="percentage">
            <text:p>50.96%</text:p>
          </table:table-cell>
          <table:table-cell table:style-name="ce4" table:formula="of:=[.Y5]*SQRT([.R5]^2+[.J5]^2)" office:value-type="percentage" office:value="0.000254812456600196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CS_04</text:p>
          </table:table-cell>
          <table:table-cell table:style-name="ce1" office:value-type="float" office:value="1.3468" calcext:value-type="float">
            <text:p>1.3468</text:p>
          </table:table-cell>
          <table:table-cell table:style-name="ce3" office:value-type="float" office:value="0.0230433" calcext:value-type="float">
            <text:p>2.30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28039" calcext:value-type="float">
            <text:p>2.80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42716" calcext:value-type="float">
            <text:p>4.43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95354" calcext:value-type="float">
            <text:p>9.54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181843" calcext:value-type="float">
            <text:p>1.82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187725" calcext:value-type="float">
            <text:p>1.88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107298" calcext:value-type="float">
            <text:p>1.07E-02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476866" calcext:value-type="float">
            <text:p>4.77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6]/[.I6]" office:value-type="percentage" office:value="0.190703064370661" calcext:value-type="percentage">
            <text:p>19.07%</text:p>
          </table:table-cell>
          <table:table-cell table:style-name="ce4" table:formula="of:=[.S6]*SQRT([.L6]^2+[.J6]^2)" office:value-type="percentage" office:value="0.000111198039454491" calcext:value-type="percentage">
            <text:p>0.01%</text:p>
          </table:table-cell>
          <table:table-cell table:style-name="ce4" table:formula="of:=[.M6]/[.I6]" office:value-type="percentage" office:value="0.196871657193196" calcext:value-type="percentage">
            <text:p>19.69%</text:p>
          </table:table-cell>
          <table:table-cell table:style-name="ce4" table:formula="of:=[.U6]*SQRT([.N6]^2+[.J6]^2)" office:value-type="percentage" office:value="0.000132065522498106" calcext:value-type="percentage">
            <text:p>0.01%</text:p>
          </table:table-cell>
          <table:table-cell table:style-name="ce4" table:formula="of:=[.O6]/[.I6]" office:value-type="percentage" office:value="0.112525955911656" calcext:value-type="percentage">
            <text:p>11.25%</text:p>
          </table:table-cell>
          <table:table-cell table:style-name="ce4" table:formula="of:=[.W6]*SQRT([.P6]^2+[.J6]^2)" office:value-type="percentage" office:value="0.0000856972148743614" calcext:value-type="percentage">
            <text:p>0.01%</text:p>
          </table:table-cell>
          <table:table-cell table:style-name="ce4" table:formula="of:=[.Q6]/[.I6]" office:value-type="percentage" office:value="0.500100677475512" calcext:value-type="percentage">
            <text:p>50.01%</text:p>
          </table:table-cell>
          <table:table-cell table:style-name="ce4" table:formula="of:=[.Y6]*SQRT([.R6]^2+[.J6]^2)" office:value-type="percentage" office:value="0.000250050338737756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CS_05</text:p>
          </table:table-cell>
          <table:table-cell table:style-name="ce1" office:value-type="float" office:value="1.6835" calcext:value-type="float">
            <text:p>1.6835</text:p>
          </table:table-cell>
          <table:table-cell table:style-name="ce3" office:value-type="float" office:value="0.0216689" calcext:value-type="float">
            <text:p>2.17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283318" calcext:value-type="float">
            <text:p>2.83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40879" calcext:value-type="float">
            <text:p>4.41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940886" calcext:value-type="float">
            <text:p>9.41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158488" calcext:value-type="float">
            <text:p>1.58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193216" calcext:value-type="float">
            <text:p>1.93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115229" calcext:value-type="float">
            <text:p>1.15E-02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466933" calcext:value-type="float">
            <text:p>4.67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7]/[.I7]" office:value-type="percentage" office:value="0.168445486488267" calcext:value-type="percentage">
            <text:p>16.84%</text:p>
          </table:table-cell>
          <table:table-cell table:style-name="ce4" table:formula="of:=[.S7]*SQRT([.L7]^2+[.J7]^2)" office:value-type="percentage" office:value="0.000112996667487237" calcext:value-type="percentage">
            <text:p>0.01%</text:p>
          </table:table-cell>
          <table:table-cell table:style-name="ce4" table:formula="of:=[.M7]/[.I7]" office:value-type="percentage" office:value="0.205355377803475" calcext:value-type="percentage">
            <text:p>20.54%</text:p>
          </table:table-cell>
          <table:table-cell table:style-name="ce4" table:formula="of:=[.U7]*SQRT([.N7]^2+[.J7]^2)" office:value-type="percentage" office:value="0.000137756575294116" calcext:value-type="percentage">
            <text:p>0.01%</text:p>
          </table:table-cell>
          <table:table-cell table:style-name="ce4" table:formula="of:=[.O7]/[.I7]" office:value-type="percentage" office:value="0.122468609374568" calcext:value-type="percentage">
            <text:p>12.25%</text:p>
          </table:table-cell>
          <table:table-cell table:style-name="ce4" table:formula="of:=[.W7]*SQRT([.P7]^2+[.J7]^2)" office:value-type="percentage" office:value="0.0000932693141587389" calcext:value-type="percentage">
            <text:p>0.01%</text:p>
          </table:table-cell>
          <table:table-cell table:style-name="ce4" table:formula="of:=[.Q7]/[.I7]" office:value-type="percentage" office:value="0.49626947366631" calcext:value-type="percentage">
            <text:p>49.63%</text:p>
          </table:table-cell>
          <table:table-cell table:style-name="ce4" table:formula="of:=[.Y7]*SQRT([.R7]^2+[.J7]^2)" office:value-type="percentage" office:value="0.000248134736833155" calcext:value-type="percentage">
            <text:p>0.02%</text:p>
          </table:table-cell>
        </table:table-row>
        <table:table-row table:style-name="ro1">
          <table:table-cell table:style-name="ce1" office:value-type="string" calcext:value-type="string">
            <text:p>CS_06</text:p>
          </table:table-cell>
          <table:table-cell table:style-name="ce1" office:value-type="float" office:value="2.0202" calcext:value-type="float">
            <text:p>2.0202</text:p>
          </table:table-cell>
          <table:table-cell table:style-name="ce3" office:value-type="float" office:value="0.02079" calcext:value-type="float">
            <text:p>2.08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286771" calcext:value-type="float">
            <text:p>2.87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4128" calcext:value-type="float">
            <text:p>4.41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935951" calcext:value-type="float">
            <text:p>9.36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142445" calcext:value-type="float">
            <text:p>1.42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198715" calcext:value-type="float">
            <text:p>1.99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12283" calcext:value-type="float">
            <text:p>1.23E-02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46399" calcext:value-type="float">
            <text:p>4.64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8]/[.I8]" office:value-type="percentage" office:value="0.152192796417761" calcext:value-type="percentage">
            <text:p>15.22%</text:p>
          </table:table-cell>
          <table:table-cell table:style-name="ce4" table:formula="of:=[.S8]*SQRT([.L8]^2+[.J8]^2)" office:value-type="percentage" office:value="0.00010209403154277" calcext:value-type="percentage">
            <text:p>0.01%</text:p>
          </table:table-cell>
          <table:table-cell table:style-name="ce4" table:formula="of:=[.M8]/[.I8]" office:value-type="percentage" office:value="0.212313465127982" calcext:value-type="percentage">
            <text:p>21.23%</text:p>
          </table:table-cell>
          <table:table-cell table:style-name="ce4" table:formula="of:=[.U8]*SQRT([.N8]^2+[.J8]^2)" office:value-type="percentage" office:value="0.00014242420216941" calcext:value-type="percentage">
            <text:p>0.01%</text:p>
          </table:table-cell>
          <table:table-cell table:style-name="ce4" table:formula="of:=[.O8]/[.I8]" office:value-type="percentage" office:value="0.131235502713283" calcext:value-type="percentage">
            <text:p>13.12%</text:p>
          </table:table-cell>
          <table:table-cell table:style-name="ce4" table:formula="of:=[.W8]*SQRT([.P8]^2+[.J8]^2)" office:value-type="percentage" office:value="0.0000999459812098351" calcext:value-type="percentage">
            <text:p>0.01%</text:p>
          </table:table-cell>
          <table:table-cell table:style-name="ce4" table:formula="of:=[.Q8]/[.I8]" office:value-type="percentage" office:value="0.495741764259026" calcext:value-type="percentage">
            <text:p>49.57%</text:p>
          </table:table-cell>
          <table:table-cell table:style-name="ce4" table:formula="of:=[.Y8]*SQRT([.R8]^2+[.J8]^2)" office:value-type="percentage" office:value="0.000247870882129513" calcext:value-type="percentage">
            <text:p>0.02%</text:p>
          </table:table-cell>
        </table:table-row>
        <table:table-row table:style-name="ro1">
          <table:table-cell table:style-name="ce1" office:value-type="string" calcext:value-type="string">
            <text:p>CS_07</text:p>
          </table:table-cell>
          <table:table-cell table:style-name="ce1" office:value-type="float" office:value="2.3569" calcext:value-type="float">
            <text:p>2.3569</text:p>
          </table:table-cell>
          <table:table-cell table:style-name="ce3" office:value-type="float" office:value="0.0201931" calcext:value-type="float">
            <text:p>2.02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29013" calcext:value-type="float">
            <text:p>2.90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41856" calcext:value-type="float">
            <text:p>4.42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933916" calcext:value-type="float">
            <text:p>9.34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130873" calcext:value-type="float">
            <text:p>1.31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203885" calcext:value-type="float">
            <text:p>2.04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129813" calcext:value-type="float">
            <text:p>1.30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464571" calcext:value-type="float">
            <text:p>4.65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9]/[.I9]" office:value-type="percentage" office:value="0.140133588031472" calcext:value-type="percentage">
            <text:p>14.01%</text:p>
          </table:table-cell>
          <table:table-cell table:style-name="ce4" table:formula="of:=[.S9]*SQRT([.L9]^2+[.J9]^2)" office:value-type="percentage" office:value="0.0000940044686307965" calcext:value-type="percentage">
            <text:p>0.01%</text:p>
          </table:table-cell>
          <table:table-cell table:style-name="ce4" table:formula="of:=[.M9]/[.I9]" office:value-type="percentage" office:value="0.21831192526951" calcext:value-type="percentage">
            <text:p>21.83%</text:p>
          </table:table-cell>
          <table:table-cell table:style-name="ce4" table:formula="of:=[.U9]*SQRT([.N9]^2+[.J9]^2)" office:value-type="percentage" office:value="0.000146448091560444" calcext:value-type="percentage">
            <text:p>0.01%</text:p>
          </table:table-cell>
          <table:table-cell table:style-name="ce4" table:formula="of:=[.O9]/[.I9]" office:value-type="percentage" office:value="0.138998582313613" calcext:value-type="percentage">
            <text:p>13.90%</text:p>
          </table:table-cell>
          <table:table-cell table:style-name="ce4" table:formula="of:=[.W9]*SQRT([.P9]^2+[.J9]^2)" office:value-type="percentage" office:value="0.0000932430836488014" calcext:value-type="percentage">
            <text:p>0.01%</text:p>
          </table:table-cell>
          <table:table-cell table:style-name="ce4" table:formula="of:=[.Q9]/[.I9]" office:value-type="percentage" office:value="0.497444095614595" calcext:value-type="percentage">
            <text:p>49.74%</text:p>
          </table:table-cell>
          <table:table-cell table:style-name="ce4" table:formula="of:=[.Y9]*SQRT([.R9]^2+[.J9]^2)" office:value-type="percentage" office:value="0.000248722047807297" calcext:value-type="percentage">
            <text:p>0.02%</text:p>
          </table:table-cell>
        </table:table-row>
        <table:table-row table:style-name="ro1">
          <table:table-cell table:style-name="ce1" office:value-type="string" calcext:value-type="string">
            <text:p>CS_08</text:p>
          </table:table-cell>
          <table:table-cell table:style-name="ce1" office:value-type="float" office:value="2.6936" calcext:value-type="float">
            <text:p>2.6936</text:p>
          </table:table-cell>
          <table:table-cell table:style-name="ce3" office:value-type="float" office:value="0.0198376" calcext:value-type="float">
            <text:p>1.98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293651" calcext:value-type="float">
            <text:p>2.94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43322" calcext:value-type="float">
            <text:p>4.43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935349" calcext:value-type="float">
            <text:p>9.35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122817" calcext:value-type="float">
            <text:p>1.23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208935" calcext:value-type="float">
            <text:p>2.09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136538" calcext:value-type="float">
            <text:p>1.37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46829" calcext:value-type="float">
            <text:p>4.68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10]/[.I10]" office:value-type="percentage" office:value="0.131306068643897" calcext:value-type="percentage">
            <text:p>13.13%</text:p>
          </table:table-cell>
          <table:table-cell table:style-name="ce4" table:formula="of:=[.S10]*SQRT([.L10]^2+[.J10]^2)" office:value-type="percentage" office:value="0.0000880827886038019" calcext:value-type="percentage">
            <text:p>0.01%</text:p>
          </table:table-cell>
          <table:table-cell table:style-name="ce4" table:formula="of:=[.M10]/[.I10]" office:value-type="percentage" office:value="0.223376515076191" calcext:value-type="percentage">
            <text:p>22.34%</text:p>
          </table:table-cell>
          <table:table-cell table:style-name="ce4" table:formula="of:=[.U10]*SQRT([.N10]^2+[.J10]^2)" office:value-type="percentage" office:value="0.000149845521686211" calcext:value-type="percentage">
            <text:p>0.01%</text:p>
          </table:table-cell>
          <table:table-cell table:style-name="ce4" table:formula="of:=[.O10]/[.I10]" office:value-type="percentage" office:value="0.145975459427444" calcext:value-type="percentage">
            <text:p>14.60%</text:p>
          </table:table-cell>
          <table:table-cell table:style-name="ce4" table:formula="of:=[.W10]*SQRT([.P10]^2+[.J10]^2)" office:value-type="percentage" office:value="0.000097923315097958" calcext:value-type="percentage">
            <text:p>0.01%</text:p>
          </table:table-cell>
          <table:table-cell table:style-name="ce4" table:formula="of:=[.Q10]/[.I10]" office:value-type="percentage" office:value="0.500658043147531" calcext:value-type="percentage">
            <text:p>50.07%</text:p>
          </table:table-cell>
          <table:table-cell table:style-name="ce4" table:formula="of:=[.Y10]*SQRT([.R10]^2+[.J10]^2)" office:value-type="percentage" office:value="0.000250329021573766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CS_09</text:p>
          </table:table-cell>
          <table:table-cell table:style-name="ce1" office:value-type="float" office:value="3.367" calcext:value-type="float">
            <text:p>3.367</text:p>
          </table:table-cell>
          <table:table-cell table:style-name="ce3" office:value-type="float" office:value="0.019494" calcext:value-type="float">
            <text:p>1.95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301194" calcext:value-type="float">
            <text:p>3.01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46912" calcext:value-type="float">
            <text:p>4.47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943045" calcext:value-type="float">
            <text:p>9.43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112923" calcext:value-type="float">
            <text:p>1.13E-02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218865" calcext:value-type="float">
            <text:p>2.19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148679" calcext:value-type="float">
            <text:p>1.49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480467" calcext:value-type="float">
            <text:p>4.80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11]/[.I11]" office:value-type="percentage" office:value="0.119742960304121" calcext:value-type="percentage">
            <text:p>11.97%</text:p>
          </table:table-cell>
          <table:table-cell table:style-name="ce4" table:formula="of:=[.S11]*SQRT([.L11]^2+[.J11]^2)" office:value-type="percentage" office:value="0.0000911935216700656" calcext:value-type="percentage">
            <text:p>0.01%</text:p>
          </table:table-cell>
          <table:table-cell table:style-name="ce4" table:formula="of:=[.M11]/[.I11]" office:value-type="percentage" office:value="0.232083304614308" calcext:value-type="percentage">
            <text:p>23.21%</text:p>
          </table:table-cell>
          <table:table-cell table:style-name="ce4" table:formula="of:=[.U11]*SQRT([.N11]^2+[.J11]^2)" office:value-type="percentage" office:value="0.000155686213668115" calcext:value-type="percentage">
            <text:p>0.02%</text:p>
          </table:table-cell>
          <table:table-cell table:style-name="ce4" table:formula="of:=[.O11]/[.I11]" office:value-type="percentage" office:value="0.157658436235811" calcext:value-type="percentage">
            <text:p>15.77%</text:p>
          </table:table-cell>
          <table:table-cell table:style-name="ce4" table:formula="of:=[.W11]*SQRT([.P11]^2+[.J11]^2)" office:value-type="percentage" office:value="0.000105760494194877" calcext:value-type="percentage">
            <text:p>0.01%</text:p>
          </table:table-cell>
          <table:table-cell table:style-name="ce4" table:formula="of:=[.Q11]/[.I11]" office:value-type="percentage" office:value="0.50948470115424" calcext:value-type="percentage">
            <text:p>50.95%</text:p>
          </table:table-cell>
          <table:table-cell table:style-name="ce4" table:formula="of:=[.Y11]*SQRT([.R11]^2+[.J11]^2)" office:value-type="percentage" office:value="0.00025474235057712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CS_10</text:p>
          </table:table-cell>
          <table:table-cell table:style-name="ce1" office:value-type="float" office:value="4.0404" calcext:value-type="float">
            <text:p>4.0404</text:p>
          </table:table-cell>
          <table:table-cell table:style-name="ce3" office:value-type="float" office:value="0.0194849" calcext:value-type="float">
            <text:p>1.95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308209" calcext:value-type="float">
            <text:p>3.08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52175" calcext:value-type="float">
            <text:p>4.52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955233" calcext:value-type="float">
            <text:p>9.55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108173" calcext:value-type="float">
            <text:p>1.08E-02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228126" calcext:value-type="float">
            <text:p>2.28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159597" calcext:value-type="float">
            <text:p>1.60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495896" calcext:value-type="float">
            <text:p>4.96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12]/[.I12]" office:value-type="percentage" office:value="0.113242528262738" calcext:value-type="percentage">
            <text:p>11.32%</text:p>
          </table:table-cell>
          <table:table-cell table:style-name="ce4" table:formula="of:=[.S12]*SQRT([.L12]^2+[.J12]^2)" office:value-type="percentage" office:value="0.0000862429401183394" calcext:value-type="percentage">
            <text:p>0.01%</text:p>
          </table:table-cell>
          <table:table-cell table:style-name="ce4" table:formula="of:=[.M12]/[.I12]" office:value-type="percentage" office:value="0.238817126292747" calcext:value-type="percentage">
            <text:p>23.88%</text:p>
          </table:table-cell>
          <table:table-cell table:style-name="ce4" table:formula="of:=[.U12]*SQRT([.N12]^2+[.J12]^2)" office:value-type="percentage" office:value="0.00013925311750782" calcext:value-type="percentage">
            <text:p>0.01%</text:p>
          </table:table-cell>
          <table:table-cell table:style-name="ce4" table:formula="of:=[.O12]/[.I12]" office:value-type="percentage" office:value="0.167076514316402" calcext:value-type="percentage">
            <text:p>16.71%</text:p>
          </table:table-cell>
          <table:table-cell table:style-name="ce4" table:formula="of:=[.W12]*SQRT([.P12]^2+[.J12]^2)" office:value-type="percentage" office:value="0.000112078333036558" calcext:value-type="percentage">
            <text:p>0.01%</text:p>
          </table:table-cell>
          <table:table-cell table:style-name="ce4" table:formula="of:=[.Q12]/[.I12]" office:value-type="percentage" office:value="0.519136168871888" calcext:value-type="percentage">
            <text:p>51.91%</text:p>
          </table:table-cell>
          <table:table-cell table:style-name="ce4" table:formula="of:=[.Y12]*SQRT([.R12]^2+[.J12]^2)" office:value-type="percentage" office:value="0.000259568084435944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CS_11</text:p>
          </table:table-cell>
          <table:table-cell table:style-name="ce1" office:value-type="float" office:value="4.7138" calcext:value-type="float">
            <text:p>4.7138</text:p>
          </table:table-cell>
          <table:table-cell table:style-name="ce3" office:value-type="float" office:value="0.0196193" calcext:value-type="float">
            <text:p>1.96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314532" calcext:value-type="float">
            <text:p>3.15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56548" calcext:value-type="float">
            <text:p>4.57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967274" calcext:value-type="float">
            <text:p>9.67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106293" calcext:value-type="float">
            <text:p>1.06E-02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236233" calcext:value-type="float">
            <text:p>2.36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169099" calcext:value-type="float">
            <text:p>1.69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511625" calcext:value-type="float">
            <text:p>5.12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13]/[.I13]" office:value-type="percentage" office:value="0.109889235108149" calcext:value-type="percentage">
            <text:p>10.99%</text:p>
          </table:table-cell>
          <table:table-cell table:style-name="ce4" table:formula="of:=[.S13]*SQRT([.L13]^2+[.J13]^2)" office:value-type="percentage" office:value="0.0000836891481360599" calcext:value-type="percentage">
            <text:p>0.01%</text:p>
          </table:table-cell>
          <table:table-cell table:style-name="ce4" table:formula="of:=[.M13]/[.I13]" office:value-type="percentage" office:value="0.244225524515287" calcext:value-type="percentage">
            <text:p>24.42%</text:p>
          </table:table-cell>
          <table:table-cell table:style-name="ce4" table:formula="of:=[.U13]*SQRT([.N13]^2+[.J13]^2)" office:value-type="percentage" office:value="0.0001424067284942" calcext:value-type="percentage">
            <text:p>0.01%</text:p>
          </table:table-cell>
          <table:table-cell table:style-name="ce4" table:formula="of:=[.O13]/[.I13]" office:value-type="percentage" office:value="0.17482016471031" calcext:value-type="percentage">
            <text:p>17.48%</text:p>
          </table:table-cell>
          <table:table-cell table:style-name="ce4" table:formula="of:=[.W13]*SQRT([.P13]^2+[.J13]^2)" office:value-type="percentage" office:value="0.000117272931638989" calcext:value-type="percentage">
            <text:p>0.01%</text:p>
          </table:table-cell>
          <table:table-cell table:style-name="ce4" table:formula="of:=[.Q13]/[.I13]" office:value-type="percentage" office:value="0.528934924333746" calcext:value-type="percentage">
            <text:p>52.89%</text:p>
          </table:table-cell>
          <table:table-cell table:style-name="ce4" table:formula="of:=[.Y13]*SQRT([.R13]^2+[.J13]^2)" office:value-type="percentage" office:value="0.000264467462166873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CS_12</text:p>
          </table:table-cell>
          <table:table-cell table:style-name="ce1" office:value-type="float" office:value="5.7239" calcext:value-type="float">
            <text:p>5.7239</text:p>
          </table:table-cell>
          <table:table-cell table:style-name="ce3" office:value-type="float" office:value="0.0198859" calcext:value-type="float">
            <text:p>1.99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32326" calcext:value-type="float">
            <text:p>3.23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63312" calcext:value-type="float">
            <text:p>4.63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985431" calcext:value-type="float">
            <text:p>9.85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105647" calcext:value-type="float">
            <text:p>1.06E-02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247043" calcext:value-type="float">
            <text:p>2.47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181316" calcext:value-type="float">
            <text:p>1.81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534006" calcext:value-type="float">
            <text:p>5.34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14]/[.I14]" office:value-type="percentage" office:value="0.107208926855356" calcext:value-type="percentage">
            <text:p>10.72%</text:p>
          </table:table-cell>
          <table:table-cell table:style-name="ce4" table:formula="of:=[.S14]*SQRT([.L14]^2+[.J14]^2)" office:value-type="percentage" office:value="0.0000816478861853549" calcext:value-type="percentage">
            <text:p>0.01%</text:p>
          </table:table-cell>
          <table:table-cell table:style-name="ce4" table:formula="of:=[.M14]/[.I14]" office:value-type="percentage" office:value="0.250695381005875" calcext:value-type="percentage">
            <text:p>25.07%</text:p>
          </table:table-cell>
          <table:table-cell table:style-name="ce4" table:formula="of:=[.U14]*SQRT([.N14]^2+[.J14]^2)" office:value-type="percentage" office:value="0.000146179270690517" calcext:value-type="percentage">
            <text:p>0.01%</text:p>
          </table:table-cell>
          <table:table-cell table:style-name="ce4" table:formula="of:=[.O14]/[.I14]" office:value-type="percentage" office:value="0.183996647152363" calcext:value-type="percentage">
            <text:p>18.40%</text:p>
          </table:table-cell>
          <table:table-cell table:style-name="ce4" table:formula="of:=[.W14]*SQRT([.P14]^2+[.J14]^2)" office:value-type="percentage" office:value="0.000123428703199418" calcext:value-type="percentage">
            <text:p>0.01%</text:p>
          </table:table-cell>
          <table:table-cell table:style-name="ce4" table:formula="of:=[.Q14]/[.I14]" office:value-type="percentage" office:value="0.541900955013593" calcext:value-type="percentage">
            <text:p>54.19%</text:p>
          </table:table-cell>
          <table:table-cell table:style-name="ce4" table:formula="of:=[.Y14]*SQRT([.R14]^2+[.J14]^2)" office:value-type="percentage" office:value="0.000270950477506797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CS_13</text:p>
          </table:table-cell>
          <table:table-cell table:style-name="ce1" office:value-type="float" office:value="6.734" calcext:value-type="float">
            <text:p>6.734</text:p>
          </table:table-cell>
          <table:table-cell table:style-name="ce3" office:value-type="float" office:value="0.0202066" calcext:value-type="float">
            <text:p>2.02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330935" calcext:value-type="float">
            <text:p>3.31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69265" calcext:value-type="float">
            <text:p>4.69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100227" calcext:value-type="float">
            <text:p>1.00E-01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106415" calcext:value-type="float">
            <text:p>1.06E-02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256591" calcext:value-type="float">
            <text:p>2.57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190968" calcext:value-type="float">
            <text:p>1.91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553974" calcext:value-type="float">
            <text:p>5.54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15]/[.I15]" office:value-type="percentage" office:value="0.106173985053928" calcext:value-type="percentage">
            <text:p>10.62%</text:p>
          </table:table-cell>
          <table:table-cell table:style-name="ce4" table:formula="of:=[.S15]*SQRT([.L15]^2+[.J15]^2)" office:value-type="percentage" office:value="0.0000808596979916098" calcext:value-type="percentage">
            <text:p>0.01%</text:p>
          </table:table-cell>
          <table:table-cell table:style-name="ce4" table:formula="of:=[.M15]/[.I15]" office:value-type="percentage" office:value="0.256009857623195" calcext:value-type="percentage">
            <text:p>25.60%</text:p>
          </table:table-cell>
          <table:table-cell table:style-name="ce4" table:formula="of:=[.U15]*SQRT([.N15]^2+[.J15]^2)" office:value-type="percentage" office:value="0.000149278116440705" calcext:value-type="percentage">
            <text:p>0.01%</text:p>
          </table:table-cell>
          <table:table-cell table:style-name="ce4" table:formula="of:=[.O15]/[.I15]" office:value-type="percentage" office:value="0.190535484450298" calcext:value-type="percentage">
            <text:p>19.05%</text:p>
          </table:table-cell>
          <table:table-cell table:style-name="ce4" table:formula="of:=[.W15]*SQRT([.P15]^2+[.J15]^2)" office:value-type="percentage" office:value="0.000111100324409073" calcext:value-type="percentage">
            <text:p>0.01%</text:p>
          </table:table-cell>
          <table:table-cell table:style-name="ce4" table:formula="of:=[.Q15]/[.I15]" office:value-type="percentage" office:value="0.552719327127421" calcext:value-type="percentage">
            <text:p>55.27%</text:p>
          </table:table-cell>
          <table:table-cell table:style-name="ce4" table:formula="of:=[.Y15]*SQRT([.R15]^2+[.J15]^2)" office:value-type="percentage" office:value="0.00027635966356371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CS_14</text:p>
          </table:table-cell>
          <table:table-cell table:style-name="ce1" office:value-type="float" office:value="7.7441" calcext:value-type="float">
            <text:p>7.7441</text:p>
          </table:table-cell>
          <table:table-cell table:style-name="ce3" office:value-type="float" office:value="0.0205145" calcext:value-type="float">
            <text:p>2.05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336663" calcext:value-type="float">
            <text:p>3.37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73199" calcext:value-type="float">
            <text:p>4.73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101501" calcext:value-type="float">
            <text:p>1.02E-01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107674" calcext:value-type="float">
            <text:p>1.08E-02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263923" calcext:value-type="float">
            <text:p>2.64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198687" calcext:value-type="float">
            <text:p>1.99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570284" calcext:value-type="float">
            <text:p>5.70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16]/[.I16]" office:value-type="percentage" office:value="0.106081713480655" calcext:value-type="percentage">
            <text:p>10.61%</text:p>
          </table:table-cell>
          <table:table-cell table:style-name="ce4" table:formula="of:=[.S16]*SQRT([.L16]^2+[.J16]^2)" office:value-type="percentage" office:value="0.0000807894260549936" calcext:value-type="percentage">
            <text:p>0.01%</text:p>
          </table:table-cell>
          <table:table-cell table:style-name="ce4" table:formula="of:=[.M16]/[.I16]" office:value-type="percentage" office:value="0.260020098324154" calcext:value-type="percentage">
            <text:p>26.00%</text:p>
          </table:table-cell>
          <table:table-cell table:style-name="ce4" table:formula="of:=[.U16]*SQRT([.N16]^2+[.J16]^2)" office:value-type="percentage" office:value="0.000151616468502109" calcext:value-type="percentage">
            <text:p>0.02%</text:p>
          </table:table-cell>
          <table:table-cell table:style-name="ce4" table:formula="of:=[.O16]/[.I16]" office:value-type="percentage" office:value="0.195748810356548" calcext:value-type="percentage">
            <text:p>19.57%</text:p>
          </table:table-cell>
          <table:table-cell table:style-name="ce4" table:formula="of:=[.W16]*SQRT([.P16]^2+[.J16]^2)" office:value-type="percentage" office:value="0.000114140189666223" calcext:value-type="percentage">
            <text:p>0.01%</text:p>
          </table:table-cell>
          <table:table-cell table:style-name="ce4" table:formula="of:=[.Q16]/[.I16]" office:value-type="percentage" office:value="0.561850622161358" calcext:value-type="percentage">
            <text:p>56.19%</text:p>
          </table:table-cell>
          <table:table-cell table:style-name="ce4" table:formula="of:=[.Y16]*SQRT([.R16]^2+[.J16]^2)" office:value-type="percentage" office:value="0.000280925311080679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CS_15</text:p>
          </table:table-cell>
          <table:table-cell table:style-name="ce1" office:value-type="float" office:value="9.0909" calcext:value-type="float">
            <text:p>9.0909</text:p>
          </table:table-cell>
          <table:table-cell table:style-name="ce3" office:value-type="float" office:value="0.0208958" calcext:value-type="float">
            <text:p>2.09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34325" calcext:value-type="float">
            <text:p>3.43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78262" calcext:value-type="float">
            <text:p>4.78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103047" calcext:value-type="float">
            <text:p>1.03E-01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109665" calcext:value-type="float">
            <text:p>1.10E-02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272315" calcext:value-type="float">
            <text:p>2.72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206981" calcext:value-type="float">
            <text:p>2.07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588961" calcext:value-type="float">
            <text:p>5.89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17]/[.I17]" office:value-type="percentage" office:value="0.106422312148825" calcext:value-type="percentage">
            <text:p>10.64%</text:p>
          </table:table-cell>
          <table:table-cell table:style-name="ce4" table:formula="of:=[.S17]*SQRT([.L17]^2+[.J17]^2)" office:value-type="percentage" office:value="0.0000810488182726878" calcext:value-type="percentage">
            <text:p>0.01%</text:p>
          </table:table-cell>
          <table:table-cell table:style-name="ce4" table:formula="of:=[.M17]/[.I17]" office:value-type="percentage" office:value="0.264262909157957" calcext:value-type="percentage">
            <text:p>26.43%</text:p>
          </table:table-cell>
          <table:table-cell table:style-name="ce4" table:formula="of:=[.U17]*SQRT([.N17]^2+[.J17]^2)" office:value-type="percentage" office:value="0.000154090431089192" calcext:value-type="percentage">
            <text:p>0.02%</text:p>
          </table:table-cell>
          <table:table-cell table:style-name="ce4" table:formula="of:=[.O17]/[.I17]" office:value-type="percentage" office:value="0.200860772268965" calcext:value-type="percentage">
            <text:p>20.09%</text:p>
          </table:table-cell>
          <table:table-cell table:style-name="ce4" table:formula="of:=[.W17]*SQRT([.P17]^2+[.J17]^2)" office:value-type="percentage" office:value="0.000117120950066181" calcext:value-type="percentage">
            <text:p>0.01%</text:p>
          </table:table-cell>
          <table:table-cell table:style-name="ce4" table:formula="of:=[.Q17]/[.I17]" office:value-type="percentage" office:value="0.571545993575747" calcext:value-type="percentage">
            <text:p>57.15%</text:p>
          </table:table-cell>
          <table:table-cell table:style-name="ce4" table:formula="of:=[.Y17]*SQRT([.R17]^2+[.J17]^2)" office:value-type="percentage" office:value="0.000285772996787874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CS_16</text:p>
          </table:table-cell>
          <table:table-cell table:style-name="ce1" office:value-type="float" office:value="10.4377" calcext:value-type="float">
            <text:p>10.4377</text:p>
          </table:table-cell>
          <table:table-cell table:style-name="ce3" office:value-type="float" office:value="0.0211767" calcext:value-type="float">
            <text:p>2.12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348184" calcext:value-type="float">
            <text:p>3.48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3" office:value-type="float" office:value="0.0482076" calcext:value-type="float">
            <text:p>4.82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104203" calcext:value-type="float">
            <text:p>1.04E-01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111137" calcext:value-type="float">
            <text:p>1.11E-02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278874" calcext:value-type="float">
            <text:p>2.79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212943" calcext:value-type="float">
            <text:p>2.13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602954" calcext:value-type="float">
            <text:p>6.03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18]/[.I18]" office:value-type="percentage" office:value="0.106654318973542" calcext:value-type="percentage">
            <text:p>10.67%</text:p>
          </table:table-cell>
          <table:table-cell table:style-name="ce4" table:formula="of:=[.S18]*SQRT([.L18]^2+[.J18]^2)" office:value-type="percentage" office:value="0.0000812255094062932" calcext:value-type="percentage">
            <text:p>0.01%</text:p>
          </table:table-cell>
          <table:table-cell table:style-name="ce4" table:formula="of:=[.M18]/[.I18]" office:value-type="percentage" office:value="0.267625692158575" calcext:value-type="percentage">
            <text:p>26.76%</text:p>
          </table:table-cell>
          <table:table-cell table:style-name="ce4" table:formula="of:=[.U18]*SQRT([.N18]^2+[.J18]^2)" office:value-type="percentage" office:value="0.000156051253680133" calcext:value-type="percentage">
            <text:p>0.02%</text:p>
          </table:table-cell>
          <table:table-cell table:style-name="ce4" table:formula="of:=[.O18]/[.I18]" office:value-type="percentage" office:value="0.204354001324338" calcext:value-type="percentage">
            <text:p>20.44%</text:p>
          </table:table-cell>
          <table:table-cell table:style-name="ce4" table:formula="of:=[.W18]*SQRT([.P18]^2+[.J18]^2)" office:value-type="percentage" office:value="0.000119157835124137" calcext:value-type="percentage">
            <text:p>0.01%</text:p>
          </table:table-cell>
          <table:table-cell table:style-name="ce4" table:formula="of:=[.Q18]/[.I18]" office:value-type="percentage" office:value="0.578634012456455" calcext:value-type="percentage">
            <text:p>57.86%</text:p>
          </table:table-cell>
          <table:table-cell table:style-name="ce4" table:formula="of:=[.Y18]*SQRT([.R18]^2+[.J18]^2)" office:value-type="percentage" office:value="0.000289317006228228" calcext:value-type="percentage">
            <text:p>0.03%</text:p>
          </table:table-cell>
        </table:table-row>
        <table:table-row table:style-name="ro1" table:number-rows-repeated="104855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Ni (Nickel)" table:style-name="ta1">
        <table:table-column table:style-name="co3" table:number-columns-repeated="2" table:default-cell-style-name="ce5"/>
        <table:table-column table:style-name="co3" table:number-columns-repeated="16" table:default-cell-style-name="ce6"/>
        <table:table-column table:style-name="co3" table:number-columns-repeated="8" table:default-cell-style-name="ce7"/>
        <table:table-row table:style-name="ro1">
          <table:table-cell table:style-name="ce1" office:value-type="string" calcext:value-type="string">
            <text:p>Simulation ID</text:p>
          </table:table-cell>
          <table:table-cell table:style-name="ce1" office:value-type="string" calcext:value-type="string">
            <text:p>Thickness (cm)</text:p>
          </table:table-cell>
          <table:table-cell table:style-name="ce3" office:value-type="string" calcext:value-type="string">
            <text:p>J+_thermal</text:p>
          </table:table-cell>
          <table:table-cell table:style-name="ce3" office:value-type="string" calcext:value-type="string">
            <text:p>R(J+_thermal)</text:p>
          </table:table-cell>
          <table:table-cell table:style-name="ce3" office:value-type="string" calcext:value-type="string">
            <text:p>J+_epithermal</text:p>
          </table:table-cell>
          <table:table-cell table:style-name="ce3" office:value-type="string" calcext:value-type="string">
            <text:p>R(J+_epithermal)</text:p>
          </table:table-cell>
          <table:table-cell table:style-name="ce3" office:value-type="string" calcext:value-type="string">
            <text:p>J+_fast</text:p>
          </table:table-cell>
          <table:table-cell table:style-name="ce3" office:value-type="string" calcext:value-type="string">
            <text:p>R(J+_fast)</text:p>
          </table:table-cell>
          <table:table-cell table:style-name="ce3" office:value-type="string" calcext:value-type="string">
            <text:p>J+_total</text:p>
          </table:table-cell>
          <table:table-cell table:style-name="ce3" office:value-type="string" calcext:value-type="string">
            <text:p>R(J+_total)</text:p>
          </table:table-cell>
          <table:table-cell table:style-name="ce3" office:value-type="string" calcext:value-type="string">
            <text:p>J-_thermal</text:p>
          </table:table-cell>
          <table:table-cell table:style-name="ce3" office:value-type="string" calcext:value-type="string">
            <text:p>R(J-_thermal)</text:p>
          </table:table-cell>
          <table:table-cell table:style-name="ce3" office:value-type="string" calcext:value-type="string">
            <text:p>J-_epithermal</text:p>
          </table:table-cell>
          <table:table-cell table:style-name="ce3" office:value-type="string" calcext:value-type="string">
            <text:p>R(J-_epithermal)</text:p>
          </table:table-cell>
          <table:table-cell table:style-name="ce3" office:value-type="string" calcext:value-type="string">
            <text:p>J-_fast</text:p>
          </table:table-cell>
          <table:table-cell table:style-name="ce3" office:value-type="string" calcext:value-type="string">
            <text:p>R(J-_fast)</text:p>
          </table:table-cell>
          <table:table-cell table:style-name="ce3" office:value-type="string" calcext:value-type="string">
            <text:p>J-_total</text:p>
          </table:table-cell>
          <table:table-cell table:style-name="ce3" office:value-type="string" calcext:value-type="string">
            <text:p>R(J-_total)</text:p>
          </table:table-cell>
          <table:table-cell table:style-name="ce4" office:value-type="string" calcext:value-type="string">
            <text:p>alpha_thermal</text:p>
          </table:table-cell>
          <table:table-cell table:style-name="ce4" office:value-type="string" calcext:value-type="string">
            <text:p>sigma(alpha_thermal)</text:p>
          </table:table-cell>
          <table:table-cell table:style-name="ce4" office:value-type="string" calcext:value-type="string">
            <text:p>alpha_epithermal</text:p>
          </table:table-cell>
          <table:table-cell table:style-name="ce4" office:value-type="string" calcext:value-type="string">
            <text:p>sigma(alpha_epithermal)</text:p>
          </table:table-cell>
          <table:table-cell table:style-name="ce4" office:value-type="string" calcext:value-type="string">
            <text:p>alpha_fast</text:p>
          </table:table-cell>
          <table:table-cell table:style-name="ce4" office:value-type="string" calcext:value-type="string">
            <text:p>sigma(alpha_fast)</text:p>
          </table:table-cell>
          <table:table-cell table:style-name="ce4" office:value-type="string" calcext:value-type="string">
            <text:p>alpha_total</text:p>
          </table:table-cell>
          <table:table-cell table:style-name="ce4" office:value-type="string" calcext:value-type="string">
            <text:p>sigma(alpha_total)</text:p>
          </table:table-cell>
        </table:table-row>
        <table:table-row table:style-name="ro1">
          <table:table-cell table:style-name="ce1" office:value-type="string" calcext:value-type="string">
            <text:p>NI_00</text:p>
          </table:table-cell>
          <table:table-cell table:style-name="ce1" office:value-type="float" office:value="0.16855" calcext:value-type="float">
            <text:p>0.16855</text:p>
          </table:table-cell>
          <table:table-cell table:style-name="ce3" office:value-type="float" office:value="0.0344208" calcext:value-type="float">
            <text:p>3.44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280788" calcext:value-type="float">
            <text:p>2.81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71456" calcext:value-type="float">
            <text:p>4.71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109645" calcext:value-type="float">
            <text:p>1.10E-01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359435" calcext:value-type="float">
            <text:p>3.59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177862" calcext:value-type="float">
            <text:p>1.78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0753228" calcext:value-type="float">
            <text:p>7.53E-03</text:p>
          </table:table-cell>
          <table:table-cell table:style-name="ce3" office:value-type="float" office:value="0.0008" calcext:value-type="float">
            <text:p>8.00E-04</text:p>
          </table:table-cell>
          <table:table-cell table:style-name="ce3" office:value-type="float" office:value="0.0612619" calcext:value-type="float">
            <text:p>6.13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2]/[.I2]" office:value-type="percentage" office:value="0.327817045920927" calcext:value-type="percentage">
            <text:p>32.78%</text:p>
          </table:table-cell>
          <table:table-cell table:style-name="ce4" table:formula="of:=[.S2]*SQRT([.L2]^2+[.J2]^2)" office:value-type="percentage" office:value="0.000191148542507522" calcext:value-type="percentage">
            <text:p>0.02%</text:p>
          </table:table-cell>
          <table:table-cell table:style-name="ce4" table:formula="of:=[.M2]/[.I2]" office:value-type="percentage" office:value="0.162216243330749" calcext:value-type="percentage">
            <text:p>16.22%</text:p>
          </table:table-cell>
          <table:table-cell table:style-name="ce4" table:formula="of:=[.U2]*SQRT([.N2]^2+[.J2]^2)" office:value-type="percentage" office:value="0.000108817964142661" calcext:value-type="percentage">
            <text:p>0.01%</text:p>
          </table:table-cell>
          <table:table-cell table:style-name="ce4" table:formula="of:=[.O2]/[.I2]" office:value-type="percentage" office:value="0.0686969766063204" calcext:value-type="percentage">
            <text:p>6.87%</text:p>
          </table:table-cell>
          <table:table-cell table:style-name="ce4" table:formula="of:=[.W2]*SQRT([.P2]^2+[.J2]^2)" office:value-type="percentage" office:value="0.0000586947225416392" calcext:value-type="percentage">
            <text:p>0.01%</text:p>
          </table:table-cell>
          <table:table-cell table:style-name="ce4" table:formula="of:=[.Q2]/[.I2]" office:value-type="percentage" office:value="0.558729536230562" calcext:value-type="percentage">
            <text:p>55.87%</text:p>
          </table:table-cell>
          <table:table-cell table:style-name="ce4" table:formula="of:=[.Y2]*SQRT([.R2]^2+[.J2]^2)" office:value-type="percentage" office:value="0.000279364768115281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NI_01</text:p>
          </table:table-cell>
          <table:table-cell table:style-name="ce1" office:value-type="float" office:value="0.3371" calcext:value-type="float">
            <text:p>0.3371</text:p>
          </table:table-cell>
          <table:table-cell table:style-name="ce3" office:value-type="float" office:value="0.0287184" calcext:value-type="float">
            <text:p>2.87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277495" calcext:value-type="float">
            <text:p>2.77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54909" calcext:value-type="float">
            <text:p>4.55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101959" calcext:value-type="float">
            <text:p>1.02E-01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27372" calcext:value-type="float">
            <text:p>2.74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180561" calcext:value-type="float">
            <text:p>1.81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0811547" calcext:value-type="float">
            <text:p>8.12E-03</text:p>
          </table:table-cell>
          <table:table-cell table:style-name="ce3" office:value-type="float" office:value="0.0008" calcext:value-type="float">
            <text:p>8.00E-04</text:p>
          </table:table-cell>
          <table:table-cell table:style-name="ce3" office:value-type="float" office:value="0.0535436" calcext:value-type="float">
            <text:p>5.35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3]/[.I3]" office:value-type="percentage" office:value="0.268460851911062" calcext:value-type="percentage">
            <text:p>26.85%</text:p>
          </table:table-cell>
          <table:table-cell table:style-name="ce4" table:formula="of:=[.S3]*SQRT([.L3]^2+[.J3]^2)" office:value-type="percentage" office:value="0.000156538231314259" calcext:value-type="percentage">
            <text:p>0.02%</text:p>
          </table:table-cell>
          <table:table-cell table:style-name="ce4" table:formula="of:=[.M3]/[.I3]" office:value-type="percentage" office:value="0.177091772182936" calcext:value-type="percentage">
            <text:p>17.71%</text:p>
          </table:table-cell>
          <table:table-cell table:style-name="ce4" table:formula="of:=[.U3]*SQRT([.N3]^2+[.J3]^2)" office:value-type="percentage" office:value="0.000118796772257086" calcext:value-type="percentage">
            <text:p>0.01%</text:p>
          </table:table-cell>
          <table:table-cell table:style-name="ce4" table:formula="of:=[.O3]/[.I3]" office:value-type="percentage" office:value="0.0795954256122559" calcext:value-type="percentage">
            <text:p>7.96%</text:p>
          </table:table-cell>
          <table:table-cell table:style-name="ce4" table:formula="of:=[.W3]*SQRT([.P3]^2+[.J3]^2)" office:value-type="percentage" office:value="0.0000680063614541257" calcext:value-type="percentage">
            <text:p>0.01%</text:p>
          </table:table-cell>
          <table:table-cell table:style-name="ce4" table:formula="of:=[.Q3]/[.I3]" office:value-type="percentage" office:value="0.525148343942173" calcext:value-type="percentage">
            <text:p>52.51%</text:p>
          </table:table-cell>
          <table:table-cell table:style-name="ce4" table:formula="of:=[.Y3]*SQRT([.R3]^2+[.J3]^2)" office:value-type="percentage" office:value="0.000262574171971086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NI_02</text:p>
          </table:table-cell>
          <table:table-cell table:style-name="ce1" office:value-type="float" office:value="0.6742" calcext:value-type="float">
            <text:p>0.6742</text:p>
          </table:table-cell>
          <table:table-cell table:style-name="ce3" office:value-type="float" office:value="0.0229742" calcext:value-type="float">
            <text:p>2.30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278446" calcext:value-type="float">
            <text:p>2.78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39301" calcext:value-type="float">
            <text:p>4.39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94749" calcext:value-type="float">
            <text:p>9.47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183221" calcext:value-type="float">
            <text:p>1.83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189907" calcext:value-type="float">
            <text:p>1.90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0934532" calcext:value-type="float">
            <text:p>9.35E-03</text:p>
          </table:table-cell>
          <table:table-cell table:style-name="ce3" office:value-type="float" office:value="0.0008" calcext:value-type="float">
            <text:p>8.00E-04</text:p>
          </table:table-cell>
          <table:table-cell table:style-name="ce3" office:value-type="float" office:value="0.0466582" calcext:value-type="float">
            <text:p>4.67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4]/[.I4]" office:value-type="percentage" office:value="0.193375127969688" calcext:value-type="percentage">
            <text:p>19.34%</text:p>
          </table:table-cell>
          <table:table-cell table:style-name="ce4" table:formula="of:=[.S4]*SQRT([.L4]^2+[.J4]^2)" office:value-type="percentage" office:value="0.000112756106885081" calcext:value-type="percentage">
            <text:p>0.01%</text:p>
          </table:table-cell>
          <table:table-cell table:style-name="ce4" table:formula="of:=[.M4]/[.I4]" office:value-type="percentage" office:value="0.20043166682498" calcext:value-type="percentage">
            <text:p>20.04%</text:p>
          </table:table-cell>
          <table:table-cell table:style-name="ce4" table:formula="of:=[.U4]*SQRT([.N4]^2+[.J4]^2)" office:value-type="percentage" office:value="0.000134453649559273" calcext:value-type="percentage">
            <text:p>0.01%</text:p>
          </table:table-cell>
          <table:table-cell table:style-name="ce4" table:formula="of:=[.O4]/[.I4]" office:value-type="percentage" office:value="0.0986323866214947" calcext:value-type="percentage">
            <text:p>9.86%</text:p>
          </table:table-cell>
          <table:table-cell table:style-name="ce4" table:formula="of:=[.W4]*SQRT([.P4]^2+[.J4]^2)" office:value-type="percentage" office:value="0.0000842715480703657" calcext:value-type="percentage">
            <text:p>0.01%</text:p>
          </table:table-cell>
          <table:table-cell table:style-name="ce4" table:formula="of:=[.Q4]/[.I4]" office:value-type="percentage" office:value="0.492440025752251" calcext:value-type="percentage">
            <text:p>49.24%</text:p>
          </table:table-cell>
          <table:table-cell table:style-name="ce4" table:formula="of:=[.Y4]*SQRT([.R4]^2+[.J4]^2)" office:value-type="percentage" office:value="0.000246220012876125" calcext:value-type="percentage">
            <text:p>0.02%</text:p>
          </table:table-cell>
        </table:table-row>
        <table:table-row table:style-name="ro1">
          <table:table-cell table:style-name="ce1" office:value-type="string" calcext:value-type="string">
            <text:p>NI_03</text:p>
          </table:table-cell>
          <table:table-cell table:style-name="ce1" office:value-type="float" office:value="1.0113" calcext:value-type="float">
            <text:p>1.0113</text:p>
          </table:table-cell>
          <table:table-cell table:style-name="ce3" office:value-type="float" office:value="0.0205141" calcext:value-type="float">
            <text:p>2.05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283747" calcext:value-type="float">
            <text:p>2.84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36235" calcext:value-type="float">
            <text:p>4.36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925123" calcext:value-type="float">
            <text:p>9.25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140951" calcext:value-type="float">
            <text:p>1.41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200507" calcext:value-type="float">
            <text:p>2.01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106058" calcext:value-type="float">
            <text:p>1.06E-02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447516" calcext:value-type="float">
            <text:p>4.48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5]/[.I5]" office:value-type="percentage" office:value="0.152359199803702" calcext:value-type="percentage">
            <text:p>15.24%</text:p>
          </table:table-cell>
          <table:table-cell table:style-name="ce4" table:formula="of:=[.S5]*SQRT([.L5]^2+[.J5]^2)" office:value-type="percentage" office:value="0.000102205658327565" calcext:value-type="percentage">
            <text:p>0.01%</text:p>
          </table:table-cell>
          <table:table-cell table:style-name="ce4" table:formula="of:=[.M5]/[.I5]" office:value-type="percentage" office:value="0.216735504359961" calcext:value-type="percentage">
            <text:p>21.67%</text:p>
          </table:table-cell>
          <table:table-cell table:style-name="ce4" table:formula="of:=[.U5]*SQRT([.N5]^2+[.J5]^2)" office:value-type="percentage" office:value="0.000145390596265972" calcext:value-type="percentage">
            <text:p>0.01%</text:p>
          </table:table-cell>
          <table:table-cell table:style-name="ce4" table:formula="of:=[.O5]/[.I5]" office:value-type="percentage" office:value="0.114642053002682" calcext:value-type="percentage">
            <text:p>11.46%</text:p>
          </table:table-cell>
          <table:table-cell table:style-name="ce4" table:formula="of:=[.W5]*SQRT([.P5]^2+[.J5]^2)" office:value-type="percentage" office:value="0.0000873087864058849" calcext:value-type="percentage">
            <text:p>0.01%</text:p>
          </table:table-cell>
          <table:table-cell table:style-name="ce4" table:formula="of:=[.Q5]/[.I5]" office:value-type="percentage" office:value="0.483736757166344" calcext:value-type="percentage">
            <text:p>48.37%</text:p>
          </table:table-cell>
          <table:table-cell table:style-name="ce4" table:formula="of:=[.Y5]*SQRT([.R5]^2+[.J5]^2)" office:value-type="percentage" office:value="0.000241868378583172" calcext:value-type="percentage">
            <text:p>0.02%</text:p>
          </table:table-cell>
        </table:table-row>
        <table:table-row table:style-name="ro1">
          <table:table-cell table:style-name="ce1" office:value-type="string" calcext:value-type="string">
            <text:p>NI_04</text:p>
          </table:table-cell>
          <table:table-cell table:style-name="ce1" office:value-type="float" office:value="1.3484" calcext:value-type="float">
            <text:p>1.3484</text:p>
          </table:table-cell>
          <table:table-cell table:style-name="ce3" office:value-type="float" office:value="0.019313" calcext:value-type="float">
            <text:p>1.93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290309" calcext:value-type="float">
            <text:p>2.90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37093" calcext:value-type="float">
            <text:p>4.37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920531" calcext:value-type="float">
            <text:p>9.21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118274" calcext:value-type="float">
            <text:p>1.18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210787" calcext:value-type="float">
            <text:p>2.11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117843" calcext:value-type="float">
            <text:p>1.18E-02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446904" calcext:value-type="float">
            <text:p>4.47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6]/[.I6]" office:value-type="percentage" office:value="0.128484537728767" calcext:value-type="percentage">
            <text:p>12.85%</text:p>
          </table:table-cell>
          <table:table-cell table:style-name="ce4" table:formula="of:=[.S6]*SQRT([.L6]^2+[.J6]^2)" office:value-type="percentage" office:value="0.0000861900481257481" calcext:value-type="percentage">
            <text:p>0.01%</text:p>
          </table:table-cell>
          <table:table-cell table:style-name="ce4" table:formula="of:=[.M6]/[.I6]" office:value-type="percentage" office:value="0.228984140675328" calcext:value-type="percentage">
            <text:p>22.90%</text:p>
          </table:table-cell>
          <table:table-cell table:style-name="ce4" table:formula="of:=[.U6]*SQRT([.N6]^2+[.J6]^2)" office:value-type="percentage" office:value="0.000153607231295822" calcext:value-type="percentage">
            <text:p>0.02%</text:p>
          </table:table-cell>
          <table:table-cell table:style-name="ce4" table:formula="of:=[.O6]/[.I6]" office:value-type="percentage" office:value="0.128016329705355" calcext:value-type="percentage">
            <text:p>12.80%</text:p>
          </table:table-cell>
          <table:table-cell table:style-name="ce4" table:formula="of:=[.W6]*SQRT([.P6]^2+[.J6]^2)" office:value-type="percentage" office:value="0.0000974943320881448" calcext:value-type="percentage">
            <text:p>0.01%</text:p>
          </table:table-cell>
          <table:table-cell table:style-name="ce4" table:formula="of:=[.Q6]/[.I6]" office:value-type="percentage" office:value="0.48548500810945" calcext:value-type="percentage">
            <text:p>48.55%</text:p>
          </table:table-cell>
          <table:table-cell table:style-name="ce4" table:formula="of:=[.Y6]*SQRT([.R6]^2+[.J6]^2)" office:value-type="percentage" office:value="0.000242742504054725" calcext:value-type="percentage">
            <text:p>0.02%</text:p>
          </table:table-cell>
        </table:table-row>
        <table:table-row table:style-name="ro1">
          <table:table-cell table:style-name="ce1" office:value-type="string" calcext:value-type="string">
            <text:p>NI_05</text:p>
          </table:table-cell>
          <table:table-cell table:style-name="ce1" office:value-type="float" office:value="1.6855" calcext:value-type="float">
            <text:p>1.6855</text:p>
          </table:table-cell>
          <table:table-cell table:style-name="ce3" office:value-type="float" office:value="0.0187932" calcext:value-type="float">
            <text:p>1.88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296935" calcext:value-type="float">
            <text:p>2.97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40068" calcext:value-type="float">
            <text:p>4.40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924935" calcext:value-type="float">
            <text:p>9.25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105796" calcext:value-type="float">
            <text:p>1.06E-02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220177" calcext:value-type="float">
            <text:p>2.20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129119" calcext:value-type="float">
            <text:p>1.29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455091" calcext:value-type="float">
            <text:p>4.55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7]/[.I7]" office:value-type="percentage" office:value="0.114382091714553" calcext:value-type="percentage">
            <text:p>11.44%</text:p>
          </table:table-cell>
          <table:table-cell table:style-name="ce4" table:formula="of:=[.S7]*SQRT([.L7]^2+[.J7]^2)" office:value-type="percentage" office:value="0.0000871108057872151" calcext:value-type="percentage">
            <text:p>0.01%</text:p>
          </table:table-cell>
          <table:table-cell table:style-name="ce4" table:formula="of:=[.M7]/[.I7]" office:value-type="percentage" office:value="0.238045916740095" calcext:value-type="percentage">
            <text:p>23.80%</text:p>
          </table:table-cell>
          <table:table-cell table:style-name="ce4" table:formula="of:=[.U7]*SQRT([.N7]^2+[.J7]^2)" office:value-type="percentage" office:value="0.000159686055479132" calcext:value-type="percentage">
            <text:p>0.02%</text:p>
          </table:table-cell>
          <table:table-cell table:style-name="ce4" table:formula="of:=[.O7]/[.I7]" office:value-type="percentage" office:value="0.139597917691513" calcext:value-type="percentage">
            <text:p>13.96%</text:p>
          </table:table-cell>
          <table:table-cell table:style-name="ce4" table:formula="of:=[.W7]*SQRT([.P7]^2+[.J7]^2)" office:value-type="percentage" office:value="0.0000936451300426934" calcext:value-type="percentage">
            <text:p>0.01%</text:p>
          </table:table-cell>
          <table:table-cell table:style-name="ce4" table:formula="of:=[.Q7]/[.I7]" office:value-type="percentage" office:value="0.492024844989107" calcext:value-type="percentage">
            <text:p>49.20%</text:p>
          </table:table-cell>
          <table:table-cell table:style-name="ce4" table:formula="of:=[.Y7]*SQRT([.R7]^2+[.J7]^2)" office:value-type="percentage" office:value="0.000246012422494554" calcext:value-type="percentage">
            <text:p>0.02%</text:p>
          </table:table-cell>
        </table:table-row>
        <table:table-row table:style-name="ro1">
          <table:table-cell table:style-name="ce1" office:value-type="string" calcext:value-type="string">
            <text:p>NI_06</text:p>
          </table:table-cell>
          <table:table-cell table:style-name="ce1" office:value-type="float" office:value="2.0226" calcext:value-type="float">
            <text:p>2.0226</text:p>
          </table:table-cell>
          <table:table-cell table:style-name="ce3" office:value-type="float" office:value="0.0185861" calcext:value-type="float">
            <text:p>1.86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303916" calcext:value-type="float">
            <text:p>3.04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44374" calcext:value-type="float">
            <text:p>4.44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934151" calcext:value-type="float">
            <text:p>9.34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986167" calcext:value-type="float">
            <text:p>9.86E-03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229076" calcext:value-type="float">
            <text:p>2.29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139906" calcext:value-type="float">
            <text:p>1.40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467599" calcext:value-type="float">
            <text:p>4.68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8]/[.I8]" office:value-type="percentage" office:value="0.105568264659568" calcext:value-type="percentage">
            <text:p>10.56%</text:p>
          </table:table-cell>
          <table:table-cell table:style-name="ce4" table:formula="of:=[.S8]*SQRT([.L8]^2+[.J8]^2)" office:value-type="percentage" office:value="0.000080398395082706" calcext:value-type="percentage">
            <text:p>0.01%</text:p>
          </table:table-cell>
          <table:table-cell table:style-name="ce4" table:formula="of:=[.M8]/[.I8]" office:value-type="percentage" office:value="0.245223737918174" calcext:value-type="percentage">
            <text:p>24.52%</text:p>
          </table:table-cell>
          <table:table-cell table:style-name="ce4" table:formula="of:=[.U8]*SQRT([.N8]^2+[.J8]^2)" office:value-type="percentage" office:value="0.000164501084304489" calcext:value-type="percentage">
            <text:p>0.02%</text:p>
          </table:table-cell>
          <table:table-cell table:style-name="ce4" table:formula="of:=[.O8]/[.I8]" office:value-type="percentage" office:value="0.14976807818008" calcext:value-type="percentage">
            <text:p>14.98%</text:p>
          </table:table-cell>
          <table:table-cell table:style-name="ce4" table:formula="of:=[.W8]*SQRT([.P8]^2+[.J8]^2)" office:value-type="percentage" office:value="0.000100467481101049" calcext:value-type="percentage">
            <text:p>0.01%</text:p>
          </table:table-cell>
          <table:table-cell table:style-name="ce4" table:formula="of:=[.Q8]/[.I8]" office:value-type="percentage" office:value="0.500560401905045" calcext:value-type="percentage">
            <text:p>50.06%</text:p>
          </table:table-cell>
          <table:table-cell table:style-name="ce4" table:formula="of:=[.Y8]*SQRT([.R8]^2+[.J8]^2)" office:value-type="percentage" office:value="0.000250280200952523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NI_07</text:p>
          </table:table-cell>
          <table:table-cell table:style-name="ce1" office:value-type="float" office:value="2.3597" calcext:value-type="float">
            <text:p>2.3597</text:p>
          </table:table-cell>
          <table:table-cell table:style-name="ce3" office:value-type="float" office:value="0.0185987" calcext:value-type="float">
            <text:p>1.86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310713" calcext:value-type="float">
            <text:p>3.11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48783" calcext:value-type="float">
            <text:p>4.49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945483" calcext:value-type="float">
            <text:p>9.45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948666" calcext:value-type="float">
            <text:p>9.49E-03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237642" calcext:value-type="float">
            <text:p>2.38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149702" calcext:value-type="float">
            <text:p>1.50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482211" calcext:value-type="float">
            <text:p>4.82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9]/[.I9]" office:value-type="percentage" office:value="0.100336653329568" calcext:value-type="percentage">
            <text:p>10.03%</text:p>
          </table:table-cell>
          <table:table-cell table:style-name="ce4" table:formula="of:=[.S9]*SQRT([.L9]^2+[.J9]^2)" office:value-type="percentage" office:value="0.0000764141185959715" calcext:value-type="percentage">
            <text:p>0.01%</text:p>
          </table:table-cell>
          <table:table-cell table:style-name="ce4" table:formula="of:=[.M9]/[.I9]" office:value-type="percentage" office:value="0.251344550880344" calcext:value-type="percentage">
            <text:p>25.13%</text:p>
          </table:table-cell>
          <table:table-cell table:style-name="ce4" table:formula="of:=[.U9]*SQRT([.N9]^2+[.J9]^2)" office:value-type="percentage" office:value="0.000146557798521478" calcext:value-type="percentage">
            <text:p>0.01%</text:p>
          </table:table-cell>
          <table:table-cell table:style-name="ce4" table:formula="of:=[.O9]/[.I9]" office:value-type="percentage" office:value="0.158333888605083" calcext:value-type="percentage">
            <text:p>15.83%</text:p>
          </table:table-cell>
          <table:table-cell table:style-name="ce4" table:formula="of:=[.W9]*SQRT([.P9]^2+[.J9]^2)" office:value-type="percentage" office:value="0.000106213601418854" calcext:value-type="percentage">
            <text:p>0.01%</text:p>
          </table:table-cell>
          <table:table-cell table:style-name="ce4" table:formula="of:=[.Q9]/[.I9]" office:value-type="percentage" office:value="0.510015515879186" calcext:value-type="percentage">
            <text:p>51.00%</text:p>
          </table:table-cell>
          <table:table-cell table:style-name="ce4" table:formula="of:=[.Y9]*SQRT([.R9]^2+[.J9]^2)" office:value-type="percentage" office:value="0.000255007757939593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NI_08</text:p>
          </table:table-cell>
          <table:table-cell table:style-name="ce1" office:value-type="float" office:value="2.6968" calcext:value-type="float">
            <text:p>2.6968</text:p>
          </table:table-cell>
          <table:table-cell table:style-name="ce3" office:value-type="float" office:value="0.0186841" calcext:value-type="float">
            <text:p>1.87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316826" calcext:value-type="float">
            <text:p>3.17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54108" calcext:value-type="float">
            <text:p>4.54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957776" calcext:value-type="float">
            <text:p>9.58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927994" calcext:value-type="float">
            <text:p>9.28E-03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245089" calcext:value-type="float">
            <text:p>2.45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15932" calcext:value-type="float">
            <text:p>1.59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497208" calcext:value-type="float">
            <text:p>4.97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10]/[.I10]" office:value-type="percentage" office:value="0.0968905046691502" calcext:value-type="percentage">
            <text:p>9.69%</text:p>
          </table:table-cell>
          <table:table-cell table:style-name="ce4" table:formula="of:=[.S10]*SQRT([.L10]^2+[.J10]^2)" office:value-type="percentage" office:value="0.0000737896099672896" calcext:value-type="percentage">
            <text:p>0.01%</text:p>
          </table:table-cell>
          <table:table-cell table:style-name="ce4" table:formula="of:=[.M10]/[.I10]" office:value-type="percentage" office:value="0.255893862448005" calcext:value-type="percentage">
            <text:p>25.59%</text:p>
          </table:table-cell>
          <table:table-cell table:style-name="ce4" table:formula="of:=[.U10]*SQRT([.N10]^2+[.J10]^2)" office:value-type="percentage" office:value="0.000149210480212047" calcext:value-type="percentage">
            <text:p>0.01%</text:p>
          </table:table-cell>
          <table:table-cell table:style-name="ce4" table:formula="of:=[.O10]/[.I10]" office:value-type="percentage" office:value="0.166343696229599" calcext:value-type="percentage">
            <text:p>16.63%</text:p>
          </table:table-cell>
          <table:table-cell table:style-name="ce4" table:formula="of:=[.W10]*SQRT([.P10]^2+[.J10]^2)" office:value-type="percentage" office:value="0.000111586743719387" calcext:value-type="percentage">
            <text:p>0.01%</text:p>
          </table:table-cell>
          <table:table-cell table:style-name="ce4" table:formula="of:=[.Q10]/[.I10]" office:value-type="percentage" office:value="0.519127645712567" calcext:value-type="percentage">
            <text:p>51.91%</text:p>
          </table:table-cell>
          <table:table-cell table:style-name="ce4" table:formula="of:=[.Y10]*SQRT([.R10]^2+[.J10]^2)" office:value-type="percentage" office:value="0.000259563822856284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NI_09</text:p>
          </table:table-cell>
          <table:table-cell table:style-name="ce1" office:value-type="float" office:value="3.371" calcext:value-type="float">
            <text:p>3.371</text:p>
          </table:table-cell>
          <table:table-cell table:style-name="ce3" office:value-type="float" office:value="0.0190406" calcext:value-type="float">
            <text:p>1.90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328063" calcext:value-type="float">
            <text:p>3.28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62558" calcext:value-type="float">
            <text:p>4.63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981027" calcext:value-type="float">
            <text:p>9.81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918234" calcext:value-type="float">
            <text:p>9.18E-03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258496" calcext:value-type="float">
            <text:p>2.58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1759" calcext:value-type="float">
            <text:p>1.76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526219" calcext:value-type="float">
            <text:p>5.26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11]/[.I11]" office:value-type="percentage" office:value="0.0935992587359981" calcext:value-type="percentage">
            <text:p>9.36%</text:p>
          </table:table-cell>
          <table:table-cell table:style-name="ce4" table:formula="of:=[.S11]*SQRT([.L11]^2+[.J11]^2)" office:value-type="percentage" office:value="0.0000712830717410412" calcext:value-type="percentage">
            <text:p>0.01%</text:p>
          </table:table-cell>
          <table:table-cell table:style-name="ce4" table:formula="of:=[.M11]/[.I11]" office:value-type="percentage" office:value="0.263495296255863" calcext:value-type="percentage">
            <text:p>26.35%</text:p>
          </table:table-cell>
          <table:table-cell table:style-name="ce4" table:formula="of:=[.U11]*SQRT([.N11]^2+[.J11]^2)" office:value-type="percentage" office:value="0.000153642839698595" calcext:value-type="percentage">
            <text:p>0.02%</text:p>
          </table:table-cell>
          <table:table-cell table:style-name="ce4" table:formula="of:=[.O11]/[.I11]" office:value-type="percentage" office:value="0.179301894851008" calcext:value-type="percentage">
            <text:p>17.93%</text:p>
          </table:table-cell>
          <table:table-cell table:style-name="ce4" table:formula="of:=[.W11]*SQRT([.P11]^2+[.J11]^2)" office:value-type="percentage" office:value="0.000120279367614412" calcext:value-type="percentage">
            <text:p>0.01%</text:p>
          </table:table-cell>
          <table:table-cell table:style-name="ce4" table:formula="of:=[.Q11]/[.I11]" office:value-type="percentage" office:value="0.536396042106894" calcext:value-type="percentage">
            <text:p>53.64%</text:p>
          </table:table-cell>
          <table:table-cell table:style-name="ce4" table:formula="of:=[.Y11]*SQRT([.R11]^2+[.J11]^2)" office:value-type="percentage" office:value="0.000268198021053447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NI_10</text:p>
          </table:table-cell>
          <table:table-cell table:style-name="ce1" office:value-type="float" office:value="4.0452" calcext:value-type="float">
            <text:p>4.0452</text:p>
          </table:table-cell>
          <table:table-cell table:style-name="ce3" office:value-type="float" office:value="0.0194298" calcext:value-type="float">
            <text:p>1.94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337413" calcext:value-type="float">
            <text:p>3.37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70121" calcext:value-type="float">
            <text:p>4.70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100183" calcext:value-type="float">
            <text:p>1.00E-01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924689" calcext:value-type="float">
            <text:p>9.25E-03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269452" calcext:value-type="float">
            <text:p>2.69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190087" calcext:value-type="float">
            <text:p>1.90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552008" calcext:value-type="float">
            <text:p>5.52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12]/[.I12]" office:value-type="percentage" office:value="0.0922999910164399" calcext:value-type="percentage">
            <text:p>9.23%</text:p>
          </table:table-cell>
          <table:table-cell table:style-name="ce4" table:formula="of:=[.S12]*SQRT([.L12]^2+[.J12]^2)" office:value-type="percentage" office:value="0.0000702935789254484" calcext:value-type="percentage">
            <text:p>0.01%</text:p>
          </table:table-cell>
          <table:table-cell table:style-name="ce4" table:formula="of:=[.M12]/[.I12]" office:value-type="percentage" office:value="0.268959803559486" calcext:value-type="percentage">
            <text:p>26.90%</text:p>
          </table:table-cell>
          <table:table-cell table:style-name="ce4" table:formula="of:=[.U12]*SQRT([.N12]^2+[.J12]^2)" office:value-type="percentage" office:value="0.000156829167620241" calcext:value-type="percentage">
            <text:p>0.02%</text:p>
          </table:table-cell>
          <table:table-cell table:style-name="ce4" table:formula="of:=[.O12]/[.I12]" office:value-type="percentage" office:value="0.189739776209537" calcext:value-type="percentage">
            <text:p>18.97%</text:p>
          </table:table-cell>
          <table:table-cell table:style-name="ce4" table:formula="of:=[.W12]*SQRT([.P12]^2+[.J12]^2)" office:value-type="percentage" office:value="0.000110636350761652" calcext:value-type="percentage">
            <text:p>0.01%</text:p>
          </table:table-cell>
          <table:table-cell table:style-name="ce4" table:formula="of:=[.Q12]/[.I12]" office:value-type="percentage" office:value="0.550999670602797" calcext:value-type="percentage">
            <text:p>55.10%</text:p>
          </table:table-cell>
          <table:table-cell table:style-name="ce4" table:formula="of:=[.Y12]*SQRT([.R12]^2+[.J12]^2)" office:value-type="percentage" office:value="0.000275499835301399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NI_11</text:p>
          </table:table-cell>
          <table:table-cell table:style-name="ce1" office:value-type="float" office:value="4.7194" calcext:value-type="float">
            <text:p>4.7194</text:p>
          </table:table-cell>
          <table:table-cell table:style-name="ce3" office:value-type="float" office:value="0.0198342" calcext:value-type="float">
            <text:p>1.98E-02</text:p>
          </table:table-cell>
          <table:table-cell table:style-name="ce3" office:value-type="float" office:value="0.0006" calcext:value-type="float">
            <text:p>6.00E-04</text:p>
          </table:table-cell>
          <table:table-cell table:style-name="ce3" office:value-type="float" office:value="0.034656" calcext:value-type="float">
            <text:p>3.47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77816" calcext:value-type="float">
            <text:p>4.78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102272" calcext:value-type="float">
            <text:p>1.02E-01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939435" calcext:value-type="float">
            <text:p>9.39E-03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279647" calcext:value-type="float">
            <text:p>2.80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203176" calcext:value-type="float">
            <text:p>2.03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576767" calcext:value-type="float">
            <text:p>5.77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13]/[.I13]" office:value-type="percentage" office:value="0.0918565198685857" calcext:value-type="percentage">
            <text:p>9.19%</text:p>
          </table:table-cell>
          <table:table-cell table:style-name="ce4" table:formula="of:=[.S13]*SQRT([.L13]^2+[.J13]^2)" office:value-type="percentage" office:value="0.0000699558413613429" calcext:value-type="percentage">
            <text:p>0.01%</text:p>
          </table:table-cell>
          <table:table-cell table:style-name="ce4" table:formula="of:=[.M13]/[.I13]" office:value-type="percentage" office:value="0.273434566645807" calcext:value-type="percentage">
            <text:p>27.34%</text:p>
          </table:table-cell>
          <table:table-cell table:style-name="ce4" table:formula="of:=[.U13]*SQRT([.N13]^2+[.J13]^2)" office:value-type="percentage" office:value="0.000159438380449957" calcext:value-type="percentage">
            <text:p>0.02%</text:p>
          </table:table-cell>
          <table:table-cell table:style-name="ce4" table:formula="of:=[.O13]/[.I13]" office:value-type="percentage" office:value="0.19866239048811" calcext:value-type="percentage">
            <text:p>19.87%</text:p>
          </table:table-cell>
          <table:table-cell table:style-name="ce4" table:formula="of:=[.W13]*SQRT([.P13]^2+[.J13]^2)" office:value-type="percentage" office:value="0.000115839084225114" calcext:value-type="percentage">
            <text:p>0.01%</text:p>
          </table:table-cell>
          <table:table-cell table:style-name="ce4" table:formula="of:=[.Q13]/[.I13]" office:value-type="percentage" office:value="0.563953965894869" calcext:value-type="percentage">
            <text:p>56.40%</text:p>
          </table:table-cell>
          <table:table-cell table:style-name="ce4" table:formula="of:=[.Y13]*SQRT([.R13]^2+[.J13]^2)" office:value-type="percentage" office:value="0.000281976982947434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NI_12</text:p>
          </table:table-cell>
          <table:table-cell table:style-name="ce1" office:value-type="float" office:value="5.7307" calcext:value-type="float">
            <text:p>5.7307</text:p>
          </table:table-cell>
          <table:table-cell table:style-name="ce3" office:value-type="float" office:value="0.0203387" calcext:value-type="float">
            <text:p>2.03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357338" calcext:value-type="float">
            <text:p>3.57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486731" calcext:value-type="float">
            <text:p>4.87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104746" calcext:value-type="float">
            <text:p>1.05E-01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96067" calcext:value-type="float">
            <text:p>9.61E-03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291823" calcext:value-type="float">
            <text:p>2.92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218902" calcext:value-type="float">
            <text:p>2.19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606793" calcext:value-type="float">
            <text:p>6.07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14]/[.I14]" office:value-type="percentage" office:value="0.0917142420712963" calcext:value-type="percentage">
            <text:p>9.17%</text:p>
          </table:table-cell>
          <table:table-cell table:style-name="ce4" table:formula="of:=[.S14]*SQRT([.L14]^2+[.J14]^2)" office:value-type="percentage" office:value="0.000069847485819127" calcext:value-type="percentage">
            <text:p>0.01%</text:p>
          </table:table-cell>
          <table:table-cell table:style-name="ce4" table:formula="of:=[.M14]/[.I14]" office:value-type="percentage" office:value="0.278600614820614" calcext:value-type="percentage">
            <text:p>27.86%</text:p>
          </table:table-cell>
          <table:table-cell table:style-name="ce4" table:formula="of:=[.U14]*SQRT([.N14]^2+[.J14]^2)" office:value-type="percentage" office:value="0.000162450678289332" calcext:value-type="percentage">
            <text:p>0.02%</text:p>
          </table:table-cell>
          <table:table-cell table:style-name="ce4" table:formula="of:=[.O14]/[.I14]" office:value-type="percentage" office:value="0.208983636606648" calcext:value-type="percentage">
            <text:p>20.90%</text:p>
          </table:table-cell>
          <table:table-cell table:style-name="ce4" table:formula="of:=[.W14]*SQRT([.P14]^2+[.J14]^2)" office:value-type="percentage" office:value="0.00012185735318632" calcext:value-type="percentage">
            <text:p>0.01%</text:p>
          </table:table-cell>
          <table:table-cell table:style-name="ce4" table:formula="of:=[.Q14]/[.I14]" office:value-type="percentage" office:value="0.579299448188952" calcext:value-type="percentage">
            <text:p>57.93%</text:p>
          </table:table-cell>
          <table:table-cell table:style-name="ce4" table:formula="of:=[.Y14]*SQRT([.R14]^2+[.J14]^2)" office:value-type="percentage" office:value="0.000289649724094476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NI_13</text:p>
          </table:table-cell>
          <table:table-cell table:style-name="ce1" office:value-type="float" office:value="6.742" calcext:value-type="float">
            <text:p>6.742</text:p>
          </table:table-cell>
          <table:table-cell table:style-name="ce3" office:value-type="float" office:value="0.0207956" calcext:value-type="float">
            <text:p>2.08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366167" calcext:value-type="float">
            <text:p>3.66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3" office:value-type="float" office:value="0.0493694" calcext:value-type="float">
            <text:p>4.94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106782" calcext:value-type="float">
            <text:p>1.07E-01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982021" calcext:value-type="float">
            <text:p>9.82E-03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301721" calcext:value-type="float">
            <text:p>3.02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231498" calcext:value-type="float">
            <text:p>2.31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631422" calcext:value-type="float">
            <text:p>6.31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15]/[.I15]" office:value-type="percentage" office:value="0.0919650315596261" calcext:value-type="percentage">
            <text:p>9.20%</text:p>
          </table:table-cell>
          <table:table-cell table:style-name="ce4" table:formula="of:=[.S15]*SQRT([.L15]^2+[.J15]^2)" office:value-type="percentage" office:value="0.0000700384814031726" calcext:value-type="percentage">
            <text:p>0.01%</text:p>
          </table:table-cell>
          <table:table-cell table:style-name="ce4" table:formula="of:=[.M15]/[.I15]" office:value-type="percentage" office:value="0.282557921747111" calcext:value-type="percentage">
            <text:p>28.26%</text:p>
          </table:table-cell>
          <table:table-cell table:style-name="ce4" table:formula="of:=[.U15]*SQRT([.N15]^2+[.J15]^2)" office:value-type="percentage" office:value="0.000164758164921487" calcext:value-type="percentage">
            <text:p>0.02%</text:p>
          </table:table-cell>
          <table:table-cell table:style-name="ce4" table:formula="of:=[.O15]/[.I15]" office:value-type="percentage" office:value="0.216794965443614" calcext:value-type="percentage">
            <text:p>21.68%</text:p>
          </table:table-cell>
          <table:table-cell table:style-name="ce4" table:formula="of:=[.W15]*SQRT([.P15]^2+[.J15]^2)" office:value-type="percentage" office:value="0.000126412101454636" calcext:value-type="percentage">
            <text:p>0.01%</text:p>
          </table:table-cell>
          <table:table-cell table:style-name="ce4" table:formula="of:=[.Q15]/[.I15]" office:value-type="percentage" office:value="0.591318761589032" calcext:value-type="percentage">
            <text:p>59.13%</text:p>
          </table:table-cell>
          <table:table-cell table:style-name="ce4" table:formula="of:=[.Y15]*SQRT([.R15]^2+[.J15]^2)" office:value-type="percentage" office:value="0.000295659380794516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NI_14</text:p>
          </table:table-cell>
          <table:table-cell table:style-name="ce1" office:value-type="float" office:value="7.7533" calcext:value-type="float">
            <text:p>7.7533</text:p>
          </table:table-cell>
          <table:table-cell table:style-name="ce3" office:value-type="float" office:value="0.0211569" calcext:value-type="float">
            <text:p>2.12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373166" calcext:value-type="float">
            <text:p>3.73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3" office:value-type="float" office:value="0.0499524" calcext:value-type="float">
            <text:p>5.00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108426" calcext:value-type="float">
            <text:p>1.08E-01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999107" calcext:value-type="float">
            <text:p>9.99E-03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309642" calcext:value-type="float">
            <text:p>3.10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241727" calcext:value-type="float">
            <text:p>2.42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651279" calcext:value-type="float">
            <text:p>6.51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4" table:formula="of:=[.K16]/[.I16]" office:value-type="percentage" office:value="0.0921464408905613" calcext:value-type="percentage">
            <text:p>9.21%</text:p>
          </table:table-cell>
          <table:table-cell table:style-name="ce4" table:formula="of:=[.S16]*SQRT([.L16]^2+[.J16]^2)" office:value-type="percentage" office:value="0.0000701766386335415" calcext:value-type="percentage">
            <text:p>0.01%</text:p>
          </table:table-cell>
          <table:table-cell table:style-name="ce4" table:formula="of:=[.M16]/[.I16]" office:value-type="percentage" office:value="0.285579104642798" calcext:value-type="percentage">
            <text:p>28.56%</text:p>
          </table:table-cell>
          <table:table-cell table:style-name="ce4" table:formula="of:=[.U16]*SQRT([.N16]^2+[.J16]^2)" office:value-type="percentage" office:value="0.000166519802134515" calcext:value-type="percentage">
            <text:p>0.02%</text:p>
          </table:table-cell>
          <table:table-cell table:style-name="ce4" table:formula="of:=[.O16]/[.I16]" office:value-type="percentage" office:value="0.222941914300998" calcext:value-type="percentage">
            <text:p>22.29%</text:p>
          </table:table-cell>
          <table:table-cell table:style-name="ce4" table:formula="of:=[.W16]*SQRT([.P16]^2+[.J16]^2)" office:value-type="percentage" office:value="0.000129996357763384" calcext:value-type="percentage">
            <text:p>0.01%</text:p>
          </table:table-cell>
          <table:table-cell table:style-name="ce4" table:formula="of:=[.Q16]/[.I16]" office:value-type="percentage" office:value="0.600666814232749" calcext:value-type="percentage">
            <text:p>60.07%</text:p>
          </table:table-cell>
          <table:table-cell table:style-name="ce4" table:formula="of:=[.Y16]*SQRT([.R16]^2+[.J16]^2)" office:value-type="percentage" office:value="0.000300333407116374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NI_15</text:p>
          </table:table-cell>
          <table:table-cell table:style-name="ce1" office:value-type="float" office:value="9.1017" calcext:value-type="float">
            <text:p>9.1017</text:p>
          </table:table-cell>
          <table:table-cell table:style-name="ce3" office:value-type="float" office:value="0.0215589" calcext:value-type="float">
            <text:p>2.16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380702" calcext:value-type="float">
            <text:p>3.81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3" office:value-type="float" office:value="0.0505636" calcext:value-type="float">
            <text:p>5.06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110193" calcext:value-type="float">
            <text:p>1.10E-01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101842" calcext:value-type="float">
            <text:p>1.02E-02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318103" calcext:value-type="float">
            <text:p>3.18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252106" calcext:value-type="float">
            <text:p>2.52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672051" calcext:value-type="float">
            <text:p>6.72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4" table:formula="of:=[.K17]/[.I17]" office:value-type="percentage" office:value="0.0924214786783189" calcext:value-type="percentage">
            <text:p>9.24%</text:p>
          </table:table-cell>
          <table:table-cell table:style-name="ce4" table:formula="of:=[.S17]*SQRT([.L17]^2+[.J17]^2)" office:value-type="percentage" office:value="0.0000703861011722516" calcext:value-type="percentage">
            <text:p>0.01%</text:p>
          </table:table-cell>
          <table:table-cell table:style-name="ce4" table:formula="of:=[.M17]/[.I17]" office:value-type="percentage" office:value="0.288678046699881" calcext:value-type="percentage">
            <text:p>28.87%</text:p>
          </table:table-cell>
          <table:table-cell table:style-name="ce4" table:formula="of:=[.U17]*SQRT([.N17]^2+[.J17]^2)" office:value-type="percentage" office:value="0.000168326780340491" calcext:value-type="percentage">
            <text:p>0.02%</text:p>
          </table:table-cell>
          <table:table-cell table:style-name="ce4" table:formula="of:=[.O17]/[.I17]" office:value-type="percentage" office:value="0.22878585754086" calcext:value-type="percentage">
            <text:p>22.88%</text:p>
          </table:table-cell>
          <table:table-cell table:style-name="ce4" table:formula="of:=[.W17]*SQRT([.P17]^2+[.J17]^2)" office:value-type="percentage" office:value="0.000133403932954169" calcext:value-type="percentage">
            <text:p>0.01%</text:p>
          </table:table-cell>
          <table:table-cell table:style-name="ce4" table:formula="of:=[.Q17]/[.I17]" office:value-type="percentage" office:value="0.60988538291906" calcext:value-type="percentage">
            <text:p>60.99%</text:p>
          </table:table-cell>
          <table:table-cell table:style-name="ce4" table:formula="of:=[.Y17]*SQRT([.R17]^2+[.J17]^2)" office:value-type="percentage" office:value="0.000258752454005173" calcext:value-type="percentage">
            <text:p>0.03%</text:p>
          </table:table-cell>
        </table:table-row>
        <table:table-row table:style-name="ro1">
          <table:table-cell table:style-name="ce1" office:value-type="string" calcext:value-type="string">
            <text:p>NI_16</text:p>
          </table:table-cell>
          <table:table-cell table:style-name="ce1" office:value-type="float" office:value="10.4501" calcext:value-type="float">
            <text:p>10.4501</text:p>
          </table:table-cell>
          <table:table-cell table:style-name="ce3" office:value-type="float" office:value="0.0218237" calcext:value-type="float">
            <text:p>2.18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386026" calcext:value-type="float">
            <text:p>3.86E-02</text:p>
          </table:table-cell>
          <table:table-cell table:style-name="ce3" office:value-type="float" office:value="0.0004" calcext:value-type="float">
            <text:p>4.00E-04</text:p>
          </table:table-cell>
          <table:table-cell table:style-name="ce3" office:value-type="float" office:value="0.0509903" calcext:value-type="float">
            <text:p>5.10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111417" calcext:value-type="float">
            <text:p>1.11E-01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103193" calcext:value-type="float">
            <text:p>1.03E-02</text:p>
          </table:table-cell>
          <table:table-cell table:style-name="ce3" office:value-type="float" office:value="0.0007" calcext:value-type="float">
            <text:p>7.00E-04</text:p>
          </table:table-cell>
          <table:table-cell table:style-name="ce3" office:value-type="float" office:value="0.0324334" calcext:value-type="float">
            <text:p>3.24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259967" calcext:value-type="float">
            <text:p>2.60E-02</text:p>
          </table:table-cell>
          <table:table-cell table:style-name="ce3" office:value-type="float" office:value="0.0005" calcext:value-type="float">
            <text:p>5.00E-04</text:p>
          </table:table-cell>
          <table:table-cell table:style-name="ce3" office:value-type="float" office:value="0.0687495" calcext:value-type="float">
            <text:p>6.87E-02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4" table:formula="of:=[.K18]/[.I18]" office:value-type="percentage" office:value="0.0926187206620175" calcext:value-type="percentage">
            <text:p>9.26%</text:p>
          </table:table-cell>
          <table:table-cell table:style-name="ce4" table:formula="of:=[.S18]*SQRT([.L18]^2+[.J18]^2)" office:value-type="percentage" office:value="0.0000705363161917315" calcext:value-type="percentage">
            <text:p>0.01%</text:p>
          </table:table-cell>
          <table:table-cell table:style-name="ce4" table:formula="of:=[.M18]/[.I18]" office:value-type="percentage" office:value="0.291099203891686" calcext:value-type="percentage">
            <text:p>29.11%</text:p>
          </table:table-cell>
          <table:table-cell table:style-name="ce4" table:formula="of:=[.U18]*SQRT([.N18]^2+[.J18]^2)" office:value-type="percentage" office:value="0.000169738545452019" calcext:value-type="percentage">
            <text:p>0.02%</text:p>
          </table:table-cell>
          <table:table-cell table:style-name="ce4" table:formula="of:=[.O18]/[.I18]" office:value-type="percentage" office:value="0.233327948158719" calcext:value-type="percentage">
            <text:p>23.33%</text:p>
          </table:table-cell>
          <table:table-cell table:style-name="ce4" table:formula="of:=[.W18]*SQRT([.P18]^2+[.J18]^2)" office:value-type="percentage" office:value="0.000136052404143645" calcext:value-type="percentage">
            <text:p>0.01%</text:p>
          </table:table-cell>
          <table:table-cell table:style-name="ce4" table:formula="of:=[.Q18]/[.I18]" office:value-type="percentage" office:value="0.617046770241525" calcext:value-type="percentage">
            <text:p>61.70%</text:p>
          </table:table-cell>
          <table:table-cell table:style-name="ce4" table:formula="of:=[.Y18]*SQRT([.R18]^2+[.J18]^2)" office:value-type="percentage" office:value="0.000261790773328224" calcext:value-type="percentage">
            <text:p>0.03%</text:p>
          </table:table-cell>
        </table:table-row>
        <table:table-row table:style-name="ro1" table:number-rows-repeated="1048557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5-09T16:02:09.687579100</dc:date>
    <meta:editing-duration>PT4M4S</meta:editing-duration>
    <meta:editing-cycles>1</meta:editing-cycles>
    <meta:generator>LibreOffice/25.2.7.2$Windows_X86_64 LibreOffice_project/5cbfd1ab6520636bb5f7b99185aa69bd7456825d</meta:generator>
    <meta:document-statistic meta:table-count="2" meta:cell-count="936" meta:object-count="0"/>
  </office:meta>
</office:document-meta>
</file>