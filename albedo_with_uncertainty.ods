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82in"/>
    </style:style>
    <style:style style:name="co2" style:family="table-column">
      <style:table-column-properties fo:break-before="auto" style:column-width="1.048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0563in"/>
    </style:style>
    <style:style style:name="co5" style:family="table-column">
      <style:table-column-properties fo:break-before="auto" style:column-width="0.7547in"/>
    </style:style>
    <style:style style:name="co6" style:family="table-column">
      <style:table-column-properties fo:break-before="auto" style:column-width="0.9693in"/>
    </style:style>
    <style:style style:name="co7" style:family="table-column">
      <style:table-column-properties fo:break-before="auto" style:column-width="0.8307in"/>
    </style:style>
    <style:style style:name="co8" style:family="table-column">
      <style:table-column-properties fo:break-before="auto" style:column-width="1.1311in"/>
    </style:style>
    <style:style style:name="co9" style:family="table-column">
      <style:table-column-properties fo:break-before="auto" style:column-width="0.6799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8138in"/>
    </style:style>
    <style:style style:name="co12" style:family="table-column">
      <style:table-column-properties fo:break-before="auto" style:column-width="0.7465in"/>
    </style:style>
    <style:style style:name="co13" style:family="table-column">
      <style:table-column-properties fo:break-before="auto" style:column-width="0.780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132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lbedo_with_uncertant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Thickness_cm</text:p>
          </table:table-cell>
          <table:table-cell table:style-name="ce1" office:value-type="string" calcext:value-type="string">
            <text:p>Jp_therm</text:p>
          </table:table-cell>
          <table:table-cell table:style-name="ce1" office:value-type="string" calcext:value-type="string">
            <text:p>Jp_therm_unc</text:p>
          </table:table-cell>
          <table:table-cell table:style-name="ce1" office:value-type="string" calcext:value-type="string">
            <text:p>Jp_epith</text:p>
          </table:table-cell>
          <table:table-cell table:style-name="ce1" office:value-type="string" calcext:value-type="string">
            <text:p>Jp_epith_unc</text:p>
          </table:table-cell>
          <table:table-cell table:style-name="ce1" office:value-type="string" calcext:value-type="string">
            <text:p>Jp_fast</text:p>
          </table:table-cell>
          <table:table-cell table:style-name="ce1" office:value-type="string" calcext:value-type="string">
            <text:p>Jp_fast_unc</text:p>
          </table:table-cell>
          <table:table-cell table:style-name="ce1" office:value-type="string" calcext:value-type="string">
            <text:p>Jp_total</text:p>
          </table:table-cell>
          <table:table-cell table:style-name="ce1" office:value-type="string" calcext:value-type="string">
            <text:p>Jp_total_unc</text:p>
          </table:table-cell>
          <table:table-cell table:style-name="ce1" office:value-type="string" calcext:value-type="string">
            <text:p>Jm_therm</text:p>
          </table:table-cell>
          <table:table-cell table:style-name="ce1" office:value-type="string" calcext:value-type="string">
            <text:p>Jm_therm_unc</text:p>
          </table:table-cell>
          <table:table-cell table:style-name="ce1" office:value-type="string" calcext:value-type="string">
            <text:p>Jm_epith</text:p>
          </table:table-cell>
          <table:table-cell table:style-name="ce1" office:value-type="string" calcext:value-type="string">
            <text:p>Jm_epith_unc</text:p>
          </table:table-cell>
          <table:table-cell table:style-name="ce1" office:value-type="string" calcext:value-type="string">
            <text:p>Jm_fast</text:p>
          </table:table-cell>
          <table:table-cell table:style-name="ce1" office:value-type="string" calcext:value-type="string">
            <text:p>Jm_fast_unc</text:p>
          </table:table-cell>
          <table:table-cell table:style-name="ce1" office:value-type="string" calcext:value-type="string">
            <text:p>Jm_total</text:p>
          </table:table-cell>
          <table:table-cell table:style-name="ce1" office:value-type="string" calcext:value-type="string">
            <text:p>Jm_total_err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477725" calcext:value-type="float">
            <text:p>0.0477725</text:p>
          </table:table-cell>
          <table:table-cell office:value-type="float" office:value="0.00002388625" calcext:value-type="float">
            <text:p>0.00002388625</text:p>
          </table:table-cell>
          <table:table-cell office:value-type="float" office:value="0.0294252" calcext:value-type="float">
            <text:p>0.0294252</text:p>
          </table:table-cell>
          <table:table-cell office:value-type="float" office:value="0.00001177008" calcext:value-type="float">
            <text:p>0.00001177008</text:p>
          </table:table-cell>
          <table:table-cell office:value-type="float" office:value="0.0514195" calcext:value-type="float">
            <text:p>0.0514195</text:p>
          </table:table-cell>
          <table:table-cell office:value-type="float" office:value="0.00001542585" calcext:value-type="float">
            <text:p>0.00001542585</text:p>
          </table:table-cell>
          <table:table-cell office:value-type="float" office:value="0.128617" calcext:value-type="float">
            <text:p>0.128617</text:p>
          </table:table-cell>
          <table:table-cell table:style-name="ce3" office:value-type="float" office:value="0.0000385851" calcext:value-type="float">
            <text:p>0.0000385851</text:p>
          </table:table-cell>
          <table:table-cell table:style-name="ce3" office:value-type="float" office:value="0.0553685" calcext:value-type="float">
            <text:p>0.0553685</text:p>
          </table:table-cell>
          <table:table-cell table:style-name="ce3" office:value-type="float" office:value="0.0000221474" calcext:value-type="float">
            <text:p>0.0000221474</text:p>
          </table:table-cell>
          <table:table-cell table:style-name="ce3" office:value-type="float" office:value="0.0180825" calcext:value-type="float">
            <text:p>0.0180825</text:p>
          </table:table-cell>
          <table:table-cell table:style-name="ce3" office:value-type="float" office:value="0.0000108495" calcext:value-type="float">
            <text:p>0.0000108495</text:p>
          </table:table-cell>
          <table:table-cell table:style-name="ce3" office:value-type="float" office:value="0.00710153" calcext:value-type="float">
            <text:p>0.00710153</text:p>
          </table:table-cell>
          <table:table-cell table:style-name="ce3" office:value-type="float" office:value="0.000005681224" calcext:value-type="float">
            <text:p>0.000005681224</text:p>
          </table:table-cell>
          <table:table-cell table:style-name="ce3" office:value-type="float" office:value="0.0805525" calcext:value-type="float">
            <text:p>0.0805525</text:p>
          </table:table-cell>
          <table:table-cell table:style-name="ce3" office:value-type="float" office:value="0.000032221" calcext:value-type="float">
            <text:p>0.00003222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67" calcext:value-type="float">
            <text:p>0.3367</text:p>
          </table:table-cell>
          <table:table-cell office:value-type="float" office:value="0.0346373" calcext:value-type="float">
            <text:p>0.0346373</text:p>
          </table:table-cell>
          <table:table-cell office:value-type="float" office:value="0.00001731865" calcext:value-type="float">
            <text:p>0.00001731865</text:p>
          </table:table-cell>
          <table:table-cell office:value-type="float" office:value="0.0281663" calcext:value-type="float">
            <text:p>0.0281663</text:p>
          </table:table-cell>
          <table:table-cell office:value-type="float" office:value="0.00001408315" calcext:value-type="float">
            <text:p>0.00001408315</text:p>
          </table:table-cell>
          <table:table-cell office:value-type="float" office:value="0.0473858" calcext:value-type="float">
            <text:p>0.0473858</text:p>
          </table:table-cell>
          <table:table-cell office:value-type="float" office:value="0.00001421574" calcext:value-type="float">
            <text:p>0.00001421574</text:p>
          </table:table-cell>
          <table:table-cell office:value-type="float" office:value="0.110189" calcext:value-type="float">
            <text:p>0.110189</text:p>
          </table:table-cell>
          <table:table-cell table:style-name="ce3" office:value-type="float" office:value="0.0000330567" calcext:value-type="float">
            <text:p>0.0000330567</text:p>
          </table:table-cell>
          <table:table-cell table:style-name="ce3" office:value-type="float" office:value="0.0361793" calcext:value-type="float">
            <text:p>0.0361793</text:p>
          </table:table-cell>
          <table:table-cell table:style-name="ce3" office:value-type="float" office:value="0.00001447172" calcext:value-type="float">
            <text:p>0.00001447172</text:p>
          </table:table-cell>
          <table:table-cell table:style-name="ce3" office:value-type="float" office:value="0.0176738" calcext:value-type="float">
            <text:p>0.0176738</text:p>
          </table:table-cell>
          <table:table-cell table:style-name="ce3" office:value-type="float" office:value="0.00001060428" calcext:value-type="float">
            <text:p>0.00001060428</text:p>
          </table:table-cell>
          <table:table-cell table:style-name="ce3" office:value-type="float" office:value="0.00804577" calcext:value-type="float">
            <text:p>0.00804577</text:p>
          </table:table-cell>
          <table:table-cell table:style-name="ce3" office:value-type="float" office:value="0.000006436616" calcext:value-type="float">
            <text:p>0.000006436616</text:p>
          </table:table-cell>
          <table:table-cell table:style-name="ce3" office:value-type="float" office:value="0.0618989" calcext:value-type="float">
            <text:p>0.0618989</text:p>
          </table:table-cell>
          <table:table-cell table:style-name="ce3" office:value-type="float" office:value="0.00002475956" calcext:value-type="float">
            <text:p>0.0000247595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0285573" calcext:value-type="float">
            <text:p>0.0285573</text:p>
          </table:table-cell>
          <table:table-cell office:value-type="float" office:value="0.00001427865" calcext:value-type="float">
            <text:p>0.00001427865</text:p>
          </table:table-cell>
          <table:table-cell office:value-type="float" office:value="0.0278066" calcext:value-type="float">
            <text:p>0.0278066</text:p>
          </table:table-cell>
          <table:table-cell office:value-type="float" office:value="0.0000139033" calcext:value-type="float">
            <text:p>0.0000139033</text:p>
          </table:table-cell>
          <table:table-cell office:value-type="float" office:value="0.0455742" calcext:value-type="float">
            <text:p>0.0455742</text:p>
          </table:table-cell>
          <table:table-cell office:value-type="float" office:value="0.00001367226" calcext:value-type="float">
            <text:p>0.00001367226</text:p>
          </table:table-cell>
          <table:table-cell office:value-type="float" office:value="0.101938" calcext:value-type="float">
            <text:p>0.101938</text:p>
          </table:table-cell>
          <table:table-cell table:style-name="ce3" office:value-type="float" office:value="0.0000305814" calcext:value-type="float">
            <text:p>0.0000305814</text:p>
          </table:table-cell>
          <table:table-cell table:style-name="ce3" office:value-type="float" office:value="0.0269831" calcext:value-type="float">
            <text:p>0.0269831</text:p>
          </table:table-cell>
          <table:table-cell table:style-name="ce3" office:value-type="float" office:value="0.00001349155" calcext:value-type="float">
            <text:p>0.00001349155</text:p>
          </table:table-cell>
          <table:table-cell table:style-name="ce3" office:value-type="float" office:value="0.0178708" calcext:value-type="float">
            <text:p>0.0178708</text:p>
          </table:table-cell>
          <table:table-cell table:style-name="ce3" office:value-type="float" office:value="0.00001072248" calcext:value-type="float">
            <text:p>0.00001072248</text:p>
          </table:table-cell>
          <table:table-cell table:style-name="ce3" office:value-type="float" office:value="0.00898095" calcext:value-type="float">
            <text:p>0.00898095</text:p>
          </table:table-cell>
          <table:table-cell table:style-name="ce3" office:value-type="float" office:value="0.00000718476" calcext:value-type="float">
            <text:p>0.00000718476</text:p>
          </table:table-cell>
          <table:table-cell table:style-name="ce3" office:value-type="float" office:value="0.0538349" calcext:value-type="float">
            <text:p>0.0538349</text:p>
          </table:table-cell>
          <table:table-cell table:style-name="ce3" office:value-type="float" office:value="0.00002153396" calcext:value-type="float">
            <text:p>0.0000215339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101" calcext:value-type="float">
            <text:p>1.0101</text:p>
          </table:table-cell>
          <table:table-cell office:value-type="float" office:value="0.0251664" calcext:value-type="float">
            <text:p>0.0251664</text:p>
          </table:table-cell>
          <table:table-cell office:value-type="float" office:value="0.0000125832" calcext:value-type="float">
            <text:p>0.0000125832</text:p>
          </table:table-cell>
          <table:table-cell office:value-type="float" office:value="0.0278499" calcext:value-type="float">
            <text:p>0.0278499</text:p>
          </table:table-cell>
          <table:table-cell office:value-type="float" office:value="0.00001392495" calcext:value-type="float">
            <text:p>0.00001392495</text:p>
          </table:table-cell>
          <table:table-cell office:value-type="float" office:value="0.0447664" calcext:value-type="float">
            <text:p>0.0447664</text:p>
          </table:table-cell>
          <table:table-cell office:value-type="float" office:value="0.00001342992" calcext:value-type="float">
            <text:p>0.00001342992</text:p>
          </table:table-cell>
          <table:table-cell office:value-type="float" office:value="0.0977827" calcext:value-type="float">
            <text:p>0.0977827</text:p>
          </table:table-cell>
          <table:table-cell table:style-name="ce3" office:value-type="float" office:value="0.00002933481" calcext:value-type="float">
            <text:p>0.00002933481</text:p>
          </table:table-cell>
          <table:table-cell table:style-name="ce3" office:value-type="float" office:value="0.0216495" calcext:value-type="float">
            <text:p>0.0216495</text:p>
          </table:table-cell>
          <table:table-cell table:style-name="ce3" office:value-type="float" office:value="0.00001082475" calcext:value-type="float">
            <text:p>0.00001082475</text:p>
          </table:table-cell>
          <table:table-cell table:style-name="ce3" office:value-type="float" office:value="0.0182866" calcext:value-type="float">
            <text:p>0.0182866</text:p>
          </table:table-cell>
          <table:table-cell table:style-name="ce3" office:value-type="float" office:value="0.00001097196" calcext:value-type="float">
            <text:p>0.00001097196</text:p>
          </table:table-cell>
          <table:table-cell table:style-name="ce3" office:value-type="float" office:value="0.00989635" calcext:value-type="float">
            <text:p>0.00989635</text:p>
          </table:table-cell>
          <table:table-cell table:style-name="ce3" office:value-type="float" office:value="0.000006927445" calcext:value-type="float">
            <text:p>0.000006927445</text:p>
          </table:table-cell>
          <table:table-cell table:style-name="ce3" office:value-type="float" office:value="0.0498325" calcext:value-type="float">
            <text:p>0.0498325</text:p>
          </table:table-cell>
          <table:table-cell table:style-name="ce3" office:value-type="float" office:value="0.000019933" calcext:value-type="float">
            <text:p>0.00001993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468" calcext:value-type="float">
            <text:p>1.3468</text:p>
          </table:table-cell>
          <table:table-cell office:value-type="float" office:value="0.0230433" calcext:value-type="float">
            <text:p>0.0230433</text:p>
          </table:table-cell>
          <table:table-cell office:value-type="float" office:value="0.00001152165" calcext:value-type="float">
            <text:p>0.00001152165</text:p>
          </table:table-cell>
          <table:table-cell office:value-type="float" office:value="0.028039" calcext:value-type="float">
            <text:p>0.028039</text:p>
          </table:table-cell>
          <table:table-cell office:value-type="float" office:value="0.0000140195" calcext:value-type="float">
            <text:p>0.0000140195</text:p>
          </table:table-cell>
          <table:table-cell office:value-type="float" office:value="0.0442716" calcext:value-type="float">
            <text:p>0.0442716</text:p>
          </table:table-cell>
          <table:table-cell office:value-type="float" office:value="0.00001328148" calcext:value-type="float">
            <text:p>0.00001328148</text:p>
          </table:table-cell>
          <table:table-cell office:value-type="float" office:value="0.095354" calcext:value-type="float">
            <text:p>0.095354</text:p>
          </table:table-cell>
          <table:table-cell table:style-name="ce3" office:value-type="float" office:value="0.0000286062" calcext:value-type="float">
            <text:p>0.0000286062</text:p>
          </table:table-cell>
          <table:table-cell table:style-name="ce3" office:value-type="float" office:value="0.0181843" calcext:value-type="float">
            <text:p>0.0181843</text:p>
          </table:table-cell>
          <table:table-cell table:style-name="ce3" office:value-type="float" office:value="0.00000909215" calcext:value-type="float">
            <text:p>0.00000909215</text:p>
          </table:table-cell>
          <table:table-cell table:style-name="ce3" office:value-type="float" office:value="0.0187725" calcext:value-type="float">
            <text:p>0.0187725</text:p>
          </table:table-cell>
          <table:table-cell table:style-name="ce3" office:value-type="float" office:value="0.0000112635" calcext:value-type="float">
            <text:p>0.0000112635</text:p>
          </table:table-cell>
          <table:table-cell table:style-name="ce3" office:value-type="float" office:value="0.0107298" calcext:value-type="float">
            <text:p>0.0107298</text:p>
          </table:table-cell>
          <table:table-cell table:style-name="ce3" office:value-type="float" office:value="0.00000751086" calcext:value-type="float">
            <text:p>0.00000751086</text:p>
          </table:table-cell>
          <table:table-cell table:style-name="ce3" office:value-type="float" office:value="0.0476866" calcext:value-type="float">
            <text:p>0.0476866</text:p>
          </table:table-cell>
          <table:table-cell table:style-name="ce3" office:value-type="float" office:value="0.00001907464" calcext:value-type="float">
            <text:p>0.0000190746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835" calcext:value-type="float">
            <text:p>1.6835</text:p>
          </table:table-cell>
          <table:table-cell office:value-type="float" office:value="0.0216689" calcext:value-type="float">
            <text:p>0.0216689</text:p>
          </table:table-cell>
          <table:table-cell office:value-type="float" office:value="0.00001083445" calcext:value-type="float">
            <text:p>0.00001083445</text:p>
          </table:table-cell>
          <table:table-cell office:value-type="float" office:value="0.0283318" calcext:value-type="float">
            <text:p>0.0283318</text:p>
          </table:table-cell>
          <table:table-cell office:value-type="float" office:value="0.0000141659" calcext:value-type="float">
            <text:p>0.0000141659</text:p>
          </table:table-cell>
          <table:table-cell office:value-type="float" office:value="0.0440879" calcext:value-type="float">
            <text:p>0.0440879</text:p>
          </table:table-cell>
          <table:table-cell office:value-type="float" office:value="0.00001322637" calcext:value-type="float">
            <text:p>0.00001322637</text:p>
          </table:table-cell>
          <table:table-cell office:value-type="float" office:value="0.0940886" calcext:value-type="float">
            <text:p>0.0940886</text:p>
          </table:table-cell>
          <table:table-cell table:style-name="ce3" office:value-type="float" office:value="0.00002822658" calcext:value-type="float">
            <text:p>0.00002822658</text:p>
          </table:table-cell>
          <table:table-cell table:style-name="ce3" office:value-type="float" office:value="0.0158488" calcext:value-type="float">
            <text:p>0.0158488</text:p>
          </table:table-cell>
          <table:table-cell table:style-name="ce3" office:value-type="float" office:value="0.00000950928" calcext:value-type="float">
            <text:p>0.00000950928</text:p>
          </table:table-cell>
          <table:table-cell table:style-name="ce3" office:value-type="float" office:value="0.0193216" calcext:value-type="float">
            <text:p>0.0193216</text:p>
          </table:table-cell>
          <table:table-cell table:style-name="ce3" office:value-type="float" office:value="0.00001159296" calcext:value-type="float">
            <text:p>0.00001159296</text:p>
          </table:table-cell>
          <table:table-cell table:style-name="ce3" office:value-type="float" office:value="0.0115229" calcext:value-type="float">
            <text:p>0.0115229</text:p>
          </table:table-cell>
          <table:table-cell table:style-name="ce3" office:value-type="float" office:value="0.00000806603" calcext:value-type="float">
            <text:p>0.00000806603</text:p>
          </table:table-cell>
          <table:table-cell table:style-name="ce3" office:value-type="float" office:value="0.0466933" calcext:value-type="float">
            <text:p>0.0466933</text:p>
          </table:table-cell>
          <table:table-cell table:style-name="ce3" office:value-type="float" office:value="0.00001867732" calcext:value-type="float">
            <text:p>0.0000186773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202" calcext:value-type="float">
            <text:p>2.0202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00010395" calcext:value-type="float">
            <text:p>0.000010395</text:p>
          </table:table-cell>
          <table:table-cell office:value-type="float" office:value="0.0286771" calcext:value-type="float">
            <text:p>0.0286771</text:p>
          </table:table-cell>
          <table:table-cell office:value-type="float" office:value="0.00001433855" calcext:value-type="float">
            <text:p>0.00001433855</text:p>
          </table:table-cell>
          <table:table-cell office:value-type="float" office:value="0.044128" calcext:value-type="float">
            <text:p>0.044128</text:p>
          </table:table-cell>
          <table:table-cell office:value-type="float" office:value="0.0000132384" calcext:value-type="float">
            <text:p>0.0000132384</text:p>
          </table:table-cell>
          <table:table-cell office:value-type="float" office:value="0.0935951" calcext:value-type="float">
            <text:p>0.0935951</text:p>
          </table:table-cell>
          <table:table-cell table:style-name="ce3" office:value-type="float" office:value="0.00002807853" calcext:value-type="float">
            <text:p>0.00002807853</text:p>
          </table:table-cell>
          <table:table-cell table:style-name="ce3" office:value-type="float" office:value="0.0142445" calcext:value-type="float">
            <text:p>0.0142445</text:p>
          </table:table-cell>
          <table:table-cell table:style-name="ce3" office:value-type="float" office:value="0.0000085467" calcext:value-type="float">
            <text:p>0.0000085467</text:p>
          </table:table-cell>
          <table:table-cell table:style-name="ce3" office:value-type="float" office:value="0.0198715" calcext:value-type="float">
            <text:p>0.0198715</text:p>
          </table:table-cell>
          <table:table-cell table:style-name="ce3" office:value-type="float" office:value="0.0000119229" calcext:value-type="float">
            <text:p>0.0000119229</text:p>
          </table:table-cell>
          <table:table-cell table:style-name="ce3" office:value-type="float" office:value="0.012283" calcext:value-type="float">
            <text:p>0.012283</text:p>
          </table:table-cell>
          <table:table-cell table:style-name="ce3" office:value-type="float" office:value="0.0000085981" calcext:value-type="float">
            <text:p>0.0000085981</text:p>
          </table:table-cell>
          <table:table-cell table:style-name="ce3" office:value-type="float" office:value="0.046399" calcext:value-type="float">
            <text:p>0.046399</text:p>
          </table:table-cell>
          <table:table-cell table:style-name="ce3" office:value-type="float" office:value="0.0000185596" calcext:value-type="float">
            <text:p>0.000018559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569" calcext:value-type="float">
            <text:p>2.3569</text:p>
          </table:table-cell>
          <table:table-cell office:value-type="float" office:value="0.0201931" calcext:value-type="float">
            <text:p>0.0201931</text:p>
          </table:table-cell>
          <table:table-cell office:value-type="float" office:value="0.00001211586" calcext:value-type="float">
            <text:p>0.00001211586</text:p>
          </table:table-cell>
          <table:table-cell office:value-type="float" office:value="0.029013" calcext:value-type="float">
            <text:p>0.029013</text:p>
          </table:table-cell>
          <table:table-cell office:value-type="float" office:value="0.0000145065" calcext:value-type="float">
            <text:p>0.0000145065</text:p>
          </table:table-cell>
          <table:table-cell office:value-type="float" office:value="0.0441856" calcext:value-type="float">
            <text:p>0.0441856</text:p>
          </table:table-cell>
          <table:table-cell office:value-type="float" office:value="0.00001325568" calcext:value-type="float">
            <text:p>0.00001325568</text:p>
          </table:table-cell>
          <table:table-cell office:value-type="float" office:value="0.0933916" calcext:value-type="float">
            <text:p>0.0933916</text:p>
          </table:table-cell>
          <table:table-cell table:style-name="ce3" office:value-type="float" office:value="0.00002801748" calcext:value-type="float">
            <text:p>0.00002801748</text:p>
          </table:table-cell>
          <table:table-cell table:style-name="ce3" office:value-type="float" office:value="0.0130873" calcext:value-type="float">
            <text:p>0.0130873</text:p>
          </table:table-cell>
          <table:table-cell table:style-name="ce3" office:value-type="float" office:value="0.00000785238" calcext:value-type="float">
            <text:p>0.00000785238</text:p>
          </table:table-cell>
          <table:table-cell table:style-name="ce3" office:value-type="float" office:value="0.0203885" calcext:value-type="float">
            <text:p>0.0203885</text:p>
          </table:table-cell>
          <table:table-cell table:style-name="ce3" office:value-type="float" office:value="0.0000122331" calcext:value-type="float">
            <text:p>0.0000122331</text:p>
          </table:table-cell>
          <table:table-cell table:style-name="ce3" office:value-type="float" office:value="0.0129813" calcext:value-type="float">
            <text:p>0.0129813</text:p>
          </table:table-cell>
          <table:table-cell table:style-name="ce3" office:value-type="float" office:value="0.00000778878" calcext:value-type="float">
            <text:p>0.00000778878</text:p>
          </table:table-cell>
          <table:table-cell table:style-name="ce3" office:value-type="float" office:value="0.0464571" calcext:value-type="float">
            <text:p>0.0464571</text:p>
          </table:table-cell>
          <table:table-cell table:style-name="ce3" office:value-type="float" office:value="0.00001858284" calcext:value-type="float">
            <text:p>0.0000185828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936" calcext:value-type="float">
            <text:p>2.6936</text:p>
          </table:table-cell>
          <table:table-cell office:value-type="float" office:value="0.0198376" calcext:value-type="float">
            <text:p>0.0198376</text:p>
          </table:table-cell>
          <table:table-cell office:value-type="float" office:value="0.00001190256" calcext:value-type="float">
            <text:p>0.00001190256</text:p>
          </table:table-cell>
          <table:table-cell office:value-type="float" office:value="0.0293651" calcext:value-type="float">
            <text:p>0.0293651</text:p>
          </table:table-cell>
          <table:table-cell office:value-type="float" office:value="0.00001468255" calcext:value-type="float">
            <text:p>0.00001468255</text:p>
          </table:table-cell>
          <table:table-cell office:value-type="float" office:value="0.0443322" calcext:value-type="float">
            <text:p>0.0443322</text:p>
          </table:table-cell>
          <table:table-cell office:value-type="float" office:value="0.00001329966" calcext:value-type="float">
            <text:p>0.00001329966</text:p>
          </table:table-cell>
          <table:table-cell office:value-type="float" office:value="0.0935349" calcext:value-type="float">
            <text:p>0.0935349</text:p>
          </table:table-cell>
          <table:table-cell table:style-name="ce3" office:value-type="float" office:value="0.00002806047" calcext:value-type="float">
            <text:p>0.00002806047</text:p>
          </table:table-cell>
          <table:table-cell table:style-name="ce3" office:value-type="float" office:value="0.0122817" calcext:value-type="float">
            <text:p>0.0122817</text:p>
          </table:table-cell>
          <table:table-cell table:style-name="ce3" office:value-type="float" office:value="0.00000736902" calcext:value-type="float">
            <text:p>0.00000736902</text:p>
          </table:table-cell>
          <table:table-cell table:style-name="ce3" office:value-type="float" office:value="0.0208935" calcext:value-type="float">
            <text:p>0.0208935</text:p>
          </table:table-cell>
          <table:table-cell table:style-name="ce3" office:value-type="float" office:value="0.0000125361" calcext:value-type="float">
            <text:p>0.0000125361</text:p>
          </table:table-cell>
          <table:table-cell table:style-name="ce3" office:value-type="float" office:value="0.0136538" calcext:value-type="float">
            <text:p>0.0136538</text:p>
          </table:table-cell>
          <table:table-cell table:style-name="ce3" office:value-type="float" office:value="0.00000819228" calcext:value-type="float">
            <text:p>0.00000819228</text:p>
          </table:table-cell>
          <table:table-cell table:style-name="ce3" office:value-type="float" office:value="0.046829" calcext:value-type="float">
            <text:p>0.046829</text:p>
          </table:table-cell>
          <table:table-cell table:style-name="ce3" office:value-type="float" office:value="0.0000187316" calcext:value-type="float">
            <text:p>0.000018731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367" calcext:value-type="float">
            <text:p>3.367</text:p>
          </table:table-cell>
          <table:table-cell office:value-type="float" office:value="0.019494" calcext:value-type="float">
            <text:p>0.019494</text:p>
          </table:table-cell>
          <table:table-cell office:value-type="float" office:value="0.0000116964" calcext:value-type="float">
            <text:p>0.0000116964</text:p>
          </table:table-cell>
          <table:table-cell office:value-type="float" office:value="0.0301194" calcext:value-type="float">
            <text:p>0.0301194</text:p>
          </table:table-cell>
          <table:table-cell office:value-type="float" office:value="0.0000150597" calcext:value-type="float">
            <text:p>0.0000150597</text:p>
          </table:table-cell>
          <table:table-cell office:value-type="float" office:value="0.0446912" calcext:value-type="float">
            <text:p>0.0446912</text:p>
          </table:table-cell>
          <table:table-cell office:value-type="float" office:value="0.00001340736" calcext:value-type="float">
            <text:p>0.00001340736</text:p>
          </table:table-cell>
          <table:table-cell office:value-type="float" office:value="0.0943045" calcext:value-type="float">
            <text:p>0.0943045</text:p>
          </table:table-cell>
          <table:table-cell table:style-name="ce3" office:value-type="float" office:value="0.00002829135" calcext:value-type="float">
            <text:p>0.00002829135</text:p>
          </table:table-cell>
          <table:table-cell table:style-name="ce3" office:value-type="float" office:value="0.0112923" calcext:value-type="float">
            <text:p>0.0112923</text:p>
          </table:table-cell>
          <table:table-cell table:style-name="ce3" office:value-type="float" office:value="0.00000790461" calcext:value-type="float">
            <text:p>0.00000790461</text:p>
          </table:table-cell>
          <table:table-cell table:style-name="ce3" office:value-type="float" office:value="0.0218865" calcext:value-type="float">
            <text:p>0.0218865</text:p>
          </table:table-cell>
          <table:table-cell table:style-name="ce3" office:value-type="float" office:value="0.0000131319" calcext:value-type="float">
            <text:p>0.0000131319</text:p>
          </table:table-cell>
          <table:table-cell table:style-name="ce3" office:value-type="float" office:value="0.0148679" calcext:value-type="float">
            <text:p>0.0148679</text:p>
          </table:table-cell>
          <table:table-cell table:style-name="ce3" office:value-type="float" office:value="0.00000892074" calcext:value-type="float">
            <text:p>0.00000892074</text:p>
          </table:table-cell>
          <table:table-cell table:style-name="ce3" office:value-type="float" office:value="0.0480467" calcext:value-type="float">
            <text:p>0.0480467</text:p>
          </table:table-cell>
          <table:table-cell table:style-name="ce3" office:value-type="float" office:value="0.00001921868" calcext:value-type="float">
            <text:p>0.0000192186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0404" calcext:value-type="float">
            <text:p>4.0404</text:p>
          </table:table-cell>
          <table:table-cell office:value-type="float" office:value="0.0194849" calcext:value-type="float">
            <text:p>0.0194849</text:p>
          </table:table-cell>
          <table:table-cell office:value-type="float" office:value="0.00001169094" calcext:value-type="float">
            <text:p>0.00001169094</text:p>
          </table:table-cell>
          <table:table-cell office:value-type="float" office:value="0.0308209" calcext:value-type="float">
            <text:p>0.0308209</text:p>
          </table:table-cell>
          <table:table-cell office:value-type="float" office:value="0.00001541045" calcext:value-type="float">
            <text:p>0.00001541045</text:p>
          </table:table-cell>
          <table:table-cell office:value-type="float" office:value="0.0452175" calcext:value-type="float">
            <text:p>0.0452175</text:p>
          </table:table-cell>
          <table:table-cell office:value-type="float" office:value="0.00001356525" calcext:value-type="float">
            <text:p>0.00001356525</text:p>
          </table:table-cell>
          <table:table-cell office:value-type="float" office:value="0.0955233" calcext:value-type="float">
            <text:p>0.0955233</text:p>
          </table:table-cell>
          <table:table-cell table:style-name="ce3" office:value-type="float" office:value="0.00002865699" calcext:value-type="float">
            <text:p>0.00002865699</text:p>
          </table:table-cell>
          <table:table-cell table:style-name="ce3" office:value-type="float" office:value="0.0108173" calcext:value-type="float">
            <text:p>0.0108173</text:p>
          </table:table-cell>
          <table:table-cell table:style-name="ce3" office:value-type="float" office:value="0.00000757211" calcext:value-type="float">
            <text:p>0.00000757211</text:p>
          </table:table-cell>
          <table:table-cell table:style-name="ce3" office:value-type="float" office:value="0.0228126" calcext:value-type="float">
            <text:p>0.0228126</text:p>
          </table:table-cell>
          <table:table-cell table:style-name="ce3" office:value-type="float" office:value="0.0000114063" calcext:value-type="float">
            <text:p>0.0000114063</text:p>
          </table:table-cell>
          <table:table-cell table:style-name="ce3" office:value-type="float" office:value="0.0159597" calcext:value-type="float">
            <text:p>0.0159597</text:p>
          </table:table-cell>
          <table:table-cell table:style-name="ce3" office:value-type="float" office:value="0.00000957582" calcext:value-type="float">
            <text:p>0.00000957582</text:p>
          </table:table-cell>
          <table:table-cell table:style-name="ce3" office:value-type="float" office:value="0.0495896" calcext:value-type="float">
            <text:p>0.0495896</text:p>
          </table:table-cell>
          <table:table-cell table:style-name="ce3" office:value-type="float" office:value="0.00001983584" calcext:value-type="float">
            <text:p>0.0000198358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7138" calcext:value-type="float">
            <text:p>4.7138</text:p>
          </table:table-cell>
          <table:table-cell office:value-type="float" office:value="0.0196193" calcext:value-type="float">
            <text:p>0.0196193</text:p>
          </table:table-cell>
          <table:table-cell office:value-type="float" office:value="0.00001177158" calcext:value-type="float">
            <text:p>0.00001177158</text:p>
          </table:table-cell>
          <table:table-cell office:value-type="float" office:value="0.0314532" calcext:value-type="float">
            <text:p>0.0314532</text:p>
          </table:table-cell>
          <table:table-cell office:value-type="float" office:value="0.0000157266" calcext:value-type="float">
            <text:p>0.0000157266</text:p>
          </table:table-cell>
          <table:table-cell office:value-type="float" office:value="0.0456548" calcext:value-type="float">
            <text:p>0.0456548</text:p>
          </table:table-cell>
          <table:table-cell office:value-type="float" office:value="0.00001369644" calcext:value-type="float">
            <text:p>0.00001369644</text:p>
          </table:table-cell>
          <table:table-cell office:value-type="float" office:value="0.0967274" calcext:value-type="float">
            <text:p>0.0967274</text:p>
          </table:table-cell>
          <table:table-cell table:style-name="ce3" office:value-type="float" office:value="0.00002901822" calcext:value-type="float">
            <text:p>0.00002901822</text:p>
          </table:table-cell>
          <table:table-cell table:style-name="ce3" office:value-type="float" office:value="0.0106293" calcext:value-type="float">
            <text:p>0.0106293</text:p>
          </table:table-cell>
          <table:table-cell table:style-name="ce3" office:value-type="float" office:value="0.00000744051" calcext:value-type="float">
            <text:p>0.00000744051</text:p>
          </table:table-cell>
          <table:table-cell table:style-name="ce3" office:value-type="float" office:value="0.0236233" calcext:value-type="float">
            <text:p>0.0236233</text:p>
          </table:table-cell>
          <table:table-cell table:style-name="ce3" office:value-type="float" office:value="0.00001181165" calcext:value-type="float">
            <text:p>0.00001181165</text:p>
          </table:table-cell>
          <table:table-cell table:style-name="ce3" office:value-type="float" office:value="0.0169099" calcext:value-type="float">
            <text:p>0.0169099</text:p>
          </table:table-cell>
          <table:table-cell table:style-name="ce3" office:value-type="float" office:value="0.00001014594" calcext:value-type="float">
            <text:p>0.00001014594</text:p>
          </table:table-cell>
          <table:table-cell table:style-name="ce3" office:value-type="float" office:value="0.0511625" calcext:value-type="float">
            <text:p>0.0511625</text:p>
          </table:table-cell>
          <table:table-cell table:style-name="ce3" office:value-type="float" office:value="0.000020465" calcext:value-type="float">
            <text:p>0.00002046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7239" calcext:value-type="float">
            <text:p>5.7239</text:p>
          </table:table-cell>
          <table:table-cell office:value-type="float" office:value="0.0198859" calcext:value-type="float">
            <text:p>0.0198859</text:p>
          </table:table-cell>
          <table:table-cell office:value-type="float" office:value="0.00001193154" calcext:value-type="float">
            <text:p>0.00001193154</text:p>
          </table:table-cell>
          <table:table-cell office:value-type="float" office:value="0.032326" calcext:value-type="float">
            <text:p>0.032326</text:p>
          </table:table-cell>
          <table:table-cell office:value-type="float" office:value="0.000016163" calcext:value-type="float">
            <text:p>0.000016163</text:p>
          </table:table-cell>
          <table:table-cell office:value-type="float" office:value="0.0463312" calcext:value-type="float">
            <text:p>0.0463312</text:p>
          </table:table-cell>
          <table:table-cell office:value-type="float" office:value="0.00001389936" calcext:value-type="float">
            <text:p>0.00001389936</text:p>
          </table:table-cell>
          <table:table-cell office:value-type="float" office:value="0.0985431" calcext:value-type="float">
            <text:p>0.0985431</text:p>
          </table:table-cell>
          <table:table-cell table:style-name="ce3" office:value-type="float" office:value="0.00002956293" calcext:value-type="float">
            <text:p>0.00002956293</text:p>
          </table:table-cell>
          <table:table-cell table:style-name="ce3" office:value-type="float" office:value="0.0105647" calcext:value-type="float">
            <text:p>0.0105647</text:p>
          </table:table-cell>
          <table:table-cell table:style-name="ce3" office:value-type="float" office:value="0.00000739529" calcext:value-type="float">
            <text:p>0.00000739529</text:p>
          </table:table-cell>
          <table:table-cell table:style-name="ce3" office:value-type="float" office:value="0.0247043" calcext:value-type="float">
            <text:p>0.0247043</text:p>
          </table:table-cell>
          <table:table-cell table:style-name="ce3" office:value-type="float" office:value="0.00001235215" calcext:value-type="float">
            <text:p>0.00001235215</text:p>
          </table:table-cell>
          <table:table-cell table:style-name="ce3" office:value-type="float" office:value="0.0181316" calcext:value-type="float">
            <text:p>0.0181316</text:p>
          </table:table-cell>
          <table:table-cell table:style-name="ce3" office:value-type="float" office:value="0.00001087896" calcext:value-type="float">
            <text:p>0.00001087896</text:p>
          </table:table-cell>
          <table:table-cell table:style-name="ce3" office:value-type="float" office:value="0.0534006" calcext:value-type="float">
            <text:p>0.0534006</text:p>
          </table:table-cell>
          <table:table-cell table:style-name="ce3" office:value-type="float" office:value="0.00002136024" calcext:value-type="float">
            <text:p>0.0000213602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734" calcext:value-type="float">
            <text:p>6.734</text:p>
          </table:table-cell>
          <table:table-cell office:value-type="float" office:value="0.0202066" calcext:value-type="float">
            <text:p>0.0202066</text:p>
          </table:table-cell>
          <table:table-cell office:value-type="float" office:value="0.00001212396" calcext:value-type="float">
            <text:p>0.00001212396</text:p>
          </table:table-cell>
          <table:table-cell office:value-type="float" office:value="0.0330935" calcext:value-type="float">
            <text:p>0.0330935</text:p>
          </table:table-cell>
          <table:table-cell office:value-type="float" office:value="0.00001654675" calcext:value-type="float">
            <text:p>0.00001654675</text:p>
          </table:table-cell>
          <table:table-cell office:value-type="float" office:value="0.0469265" calcext:value-type="float">
            <text:p>0.0469265</text:p>
          </table:table-cell>
          <table:table-cell office:value-type="float" office:value="0.00001407795" calcext:value-type="float">
            <text:p>0.00001407795</text:p>
          </table:table-cell>
          <table:table-cell office:value-type="float" office:value="0.100227" calcext:value-type="float">
            <text:p>0.100227</text:p>
          </table:table-cell>
          <table:table-cell table:style-name="ce3" office:value-type="float" office:value="0.0000300681" calcext:value-type="float">
            <text:p>0.0000300681</text:p>
          </table:table-cell>
          <table:table-cell table:style-name="ce3" office:value-type="float" office:value="0.0106415" calcext:value-type="float">
            <text:p>0.0106415</text:p>
          </table:table-cell>
          <table:table-cell table:style-name="ce3" office:value-type="float" office:value="0.00000744905" calcext:value-type="float">
            <text:p>0.00000744905</text:p>
          </table:table-cell>
          <table:table-cell table:style-name="ce3" office:value-type="float" office:value="0.0256591" calcext:value-type="float">
            <text:p>0.0256591</text:p>
          </table:table-cell>
          <table:table-cell table:style-name="ce3" office:value-type="float" office:value="0.00001282955" calcext:value-type="float">
            <text:p>0.00001282955</text:p>
          </table:table-cell>
          <table:table-cell table:style-name="ce3" office:value-type="float" office:value="0.0190968" calcext:value-type="float">
            <text:p>0.0190968</text:p>
          </table:table-cell>
          <table:table-cell table:style-name="ce3" office:value-type="float" office:value="0.0000095484" calcext:value-type="float">
            <text:p>0.0000095484</text:p>
          </table:table-cell>
          <table:table-cell table:style-name="ce3" office:value-type="float" office:value="0.0553974" calcext:value-type="float">
            <text:p>0.0553974</text:p>
          </table:table-cell>
          <table:table-cell table:style-name="ce3" office:value-type="float" office:value="0.00002215896" calcext:value-type="float">
            <text:p>0.0000221589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7441" calcext:value-type="float">
            <text:p>7.7441</text:p>
          </table:table-cell>
          <table:table-cell office:value-type="float" office:value="0.0205145" calcext:value-type="float">
            <text:p>0.0205145</text:p>
          </table:table-cell>
          <table:table-cell office:value-type="float" office:value="0.0000123087" calcext:value-type="float">
            <text:p>0.0000123087</text:p>
          </table:table-cell>
          <table:table-cell office:value-type="float" office:value="0.0336663" calcext:value-type="float">
            <text:p>0.0336663</text:p>
          </table:table-cell>
          <table:table-cell office:value-type="float" office:value="0.00001683315" calcext:value-type="float">
            <text:p>0.00001683315</text:p>
          </table:table-cell>
          <table:table-cell office:value-type="float" office:value="0.0473199" calcext:value-type="float">
            <text:p>0.0473199</text:p>
          </table:table-cell>
          <table:table-cell office:value-type="float" office:value="0.00001419597" calcext:value-type="float">
            <text:p>0.00001419597</text:p>
          </table:table-cell>
          <table:table-cell office:value-type="float" office:value="0.101501" calcext:value-type="float">
            <text:p>0.101501</text:p>
          </table:table-cell>
          <table:table-cell table:style-name="ce3" office:value-type="float" office:value="0.0000304503" calcext:value-type="float">
            <text:p>0.0000304503</text:p>
          </table:table-cell>
          <table:table-cell table:style-name="ce3" office:value-type="float" office:value="0.0107674" calcext:value-type="float">
            <text:p>0.0107674</text:p>
          </table:table-cell>
          <table:table-cell table:style-name="ce3" office:value-type="float" office:value="0.00000753718" calcext:value-type="float">
            <text:p>0.00000753718</text:p>
          </table:table-cell>
          <table:table-cell table:style-name="ce3" office:value-type="float" office:value="0.0263923" calcext:value-type="float">
            <text:p>0.0263923</text:p>
          </table:table-cell>
          <table:table-cell table:style-name="ce3" office:value-type="float" office:value="0.00001319615" calcext:value-type="float">
            <text:p>0.00001319615</text:p>
          </table:table-cell>
          <table:table-cell table:style-name="ce3" office:value-type="float" office:value="0.0198687" calcext:value-type="float">
            <text:p>0.0198687</text:p>
          </table:table-cell>
          <table:table-cell table:style-name="ce3" office:value-type="float" office:value="0.00000993435" calcext:value-type="float">
            <text:p>0.00000993435</text:p>
          </table:table-cell>
          <table:table-cell table:style-name="ce3" office:value-type="float" office:value="0.0570284" calcext:value-type="float">
            <text:p>0.0570284</text:p>
          </table:table-cell>
          <table:table-cell table:style-name="ce3" office:value-type="float" office:value="0.00002281136" calcext:value-type="float">
            <text:p>0.0000228113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0909" calcext:value-type="float">
            <text:p>9.0909</text:p>
          </table:table-cell>
          <table:table-cell office:value-type="float" office:value="0.0208958" calcext:value-type="float">
            <text:p>0.0208958</text:p>
          </table:table-cell>
          <table:table-cell office:value-type="float" office:value="0.0000104479" calcext:value-type="float">
            <text:p>0.0000104479</text:p>
          </table:table-cell>
          <table:table-cell office:value-type="float" office:value="0.034325" calcext:value-type="float">
            <text:p>0.034325</text:p>
          </table:table-cell>
          <table:table-cell office:value-type="float" office:value="0.0000171625" calcext:value-type="float">
            <text:p>0.0000171625</text:p>
          </table:table-cell>
          <table:table-cell office:value-type="float" office:value="0.0478262" calcext:value-type="float">
            <text:p>0.0478262</text:p>
          </table:table-cell>
          <table:table-cell office:value-type="float" office:value="0.00001434786" calcext:value-type="float">
            <text:p>0.00001434786</text:p>
          </table:table-cell>
          <table:table-cell office:value-type="float" office:value="0.103047" calcext:value-type="float">
            <text:p>0.103047</text:p>
          </table:table-cell>
          <table:table-cell table:style-name="ce3" office:value-type="float" office:value="0.0000309141" calcext:value-type="float">
            <text:p>0.0000309141</text:p>
          </table:table-cell>
          <table:table-cell table:style-name="ce3" office:value-type="float" office:value="0.0109665" calcext:value-type="float">
            <text:p>0.0109665</text:p>
          </table:table-cell>
          <table:table-cell table:style-name="ce3" office:value-type="float" office:value="0.00000767655" calcext:value-type="float">
            <text:p>0.00000767655</text:p>
          </table:table-cell>
          <table:table-cell table:style-name="ce3" office:value-type="float" office:value="0.0272315" calcext:value-type="float">
            <text:p>0.0272315</text:p>
          </table:table-cell>
          <table:table-cell table:style-name="ce3" office:value-type="float" office:value="0.00001361575" calcext:value-type="float">
            <text:p>0.00001361575</text:p>
          </table:table-cell>
          <table:table-cell table:style-name="ce3" office:value-type="float" office:value="0.0206981" calcext:value-type="float">
            <text:p>0.0206981</text:p>
          </table:table-cell>
          <table:table-cell table:style-name="ce3" office:value-type="float" office:value="0.00001034905" calcext:value-type="float">
            <text:p>0.00001034905</text:p>
          </table:table-cell>
          <table:table-cell table:style-name="ce3" office:value-type="float" office:value="0.0588961" calcext:value-type="float">
            <text:p>0.0588961</text:p>
          </table:table-cell>
          <table:table-cell table:style-name="ce3" office:value-type="float" office:value="0.00002355844" calcext:value-type="float">
            <text:p>0.0000235584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4377" calcext:value-type="float">
            <text:p>10.4377</text:p>
          </table:table-cell>
          <table:table-cell office:value-type="float" office:value="0.0211767" calcext:value-type="float">
            <text:p>0.0211767</text:p>
          </table:table-cell>
          <table:table-cell office:value-type="float" office:value="0.00001058835" calcext:value-type="float">
            <text:p>0.00001058835</text:p>
          </table:table-cell>
          <table:table-cell office:value-type="float" office:value="0.0348184" calcext:value-type="float">
            <text:p>0.0348184</text:p>
          </table:table-cell>
          <table:table-cell office:value-type="float" office:value="0.00001392736" calcext:value-type="float">
            <text:p>0.00001392736</text:p>
          </table:table-cell>
          <table:table-cell office:value-type="float" office:value="0.0482076" calcext:value-type="float">
            <text:p>0.0482076</text:p>
          </table:table-cell>
          <table:table-cell office:value-type="float" office:value="0.00001446228" calcext:value-type="float">
            <text:p>0.00001446228</text:p>
          </table:table-cell>
          <table:table-cell office:value-type="float" office:value="0.104203" calcext:value-type="float">
            <text:p>0.104203</text:p>
          </table:table-cell>
          <table:table-cell table:style-name="ce3" office:value-type="float" office:value="0.0000312609" calcext:value-type="float">
            <text:p>0.0000312609</text:p>
          </table:table-cell>
          <table:table-cell table:style-name="ce3" office:value-type="float" office:value="0.0111137" calcext:value-type="float">
            <text:p>0.0111137</text:p>
          </table:table-cell>
          <table:table-cell table:style-name="ce3" office:value-type="float" office:value="0.00000777959" calcext:value-type="float">
            <text:p>0.00000777959</text:p>
          </table:table-cell>
          <table:table-cell table:style-name="ce3" office:value-type="float" office:value="0.0278874" calcext:value-type="float">
            <text:p>0.0278874</text:p>
          </table:table-cell>
          <table:table-cell table:style-name="ce3" office:value-type="float" office:value="0.0000139437" calcext:value-type="float">
            <text:p>0.0000139437</text:p>
          </table:table-cell>
          <table:table-cell table:style-name="ce3" office:value-type="float" office:value="0.0212943" calcext:value-type="float">
            <text:p>0.0212943</text:p>
          </table:table-cell>
          <table:table-cell table:style-name="ce3" office:value-type="float" office:value="0.00001064715" calcext:value-type="float">
            <text:p>0.00001064715</text:p>
          </table:table-cell>
          <table:table-cell table:style-name="ce3" office:value-type="float" office:value="0.0602954" calcext:value-type="float">
            <text:p>0.0602954</text:p>
          </table:table-cell>
          <table:table-cell table:style-name="ce3" office:value-type="float" office:value="0.00002411816" calcext:value-type="float">
            <text:p>0.00002411816</text:p>
          </table:table-cell>
          <table:table-cell table:number-columns-repeated="8"/>
        </table:table-row>
        <table:table-row table:style-name="ro1">
          <table:table-cell table:style-name="Default" table:number-columns-repeated="9"/>
          <table:table-cell table:number-columns-repeated="17"/>
        </table:table-row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a_therm</text:p>
          </table:table-cell>
          <table:table-cell table:style-name="ce1" office:value-type="string" calcext:value-type="string">
            <text:p>a_therm_unc</text:p>
          </table:table-cell>
          <table:table-cell table:style-name="ce1" office:value-type="string" calcext:value-type="string">
            <text:p>a_epith</text:p>
          </table:table-cell>
          <table:table-cell table:style-name="ce1" office:value-type="string" calcext:value-type="string">
            <text:p>a_epith_err</text:p>
          </table:table-cell>
          <table:table-cell table:style-name="ce1" office:value-type="string" calcext:value-type="string">
            <text:p>a_fast</text:p>
          </table:table-cell>
          <table:table-cell table:style-name="ce5" office:value-type="string" calcext:value-type="string">
            <text:p>a_fast_unc</text:p>
          </table:table-cell>
          <table:table-cell table:style-name="ce1" office:value-type="string" calcext:value-type="string">
            <text:p>a_total</text:p>
          </table:table-cell>
          <table:table-cell table:style-name="ce1" office:value-type="string" calcext:value-type="string">
            <text:p>a_total_unc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percentage" office:value="0.430491" calcext:value-type="percentage">
            <text:p>43.05%</text:p>
          </table:table-cell>
          <table:table-cell table:style-name="ce4" office:value-type="percentage" office:value="0.000215" calcext:value-type="percentage">
            <text:p>0.02%</text:p>
          </table:table-cell>
          <table:table-cell table:style-name="ce4" office:value-type="percentage" office:value="0.140592" calcext:value-type="percentage">
            <text:p>14.06%</text:p>
          </table:table-cell>
          <table:table-cell table:style-name="ce4" office:value-type="percentage" office:value="0.000094" calcext:value-type="percentage">
            <text:p>0.01%</text:p>
          </table:table-cell>
          <table:table-cell table:style-name="ce4" office:value-type="percentage" office:value="0.055215" calcext:value-type="percentage">
            <text:p>5.52%</text:p>
          </table:table-cell>
          <table:table-cell table:style-name="ce6" office:value-type="percentage" office:value="0.000047" calcext:value-type="percentage">
            <text:p>0.005%</text:p>
          </table:table-cell>
          <table:table-cell table:style-name="ce4" office:value-type="percentage" office:value="0.626297" calcext:value-type="percentage">
            <text:p>62.63%</text:p>
          </table:table-cell>
          <table:table-cell table:style-name="ce4" office:value-type="percentage" office:value="0.000313" calcext:value-type="percentage">
            <text:p>0.03%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percentage" office:value="0.328339" calcext:value-type="percentage">
            <text:p>32.83%</text:p>
          </table:table-cell>
          <table:table-cell table:style-name="ce4" office:value-type="percentage" office:value="0.000164" calcext:value-type="percentage">
            <text:p>0.02%</text:p>
          </table:table-cell>
          <table:table-cell table:style-name="ce4" office:value-type="percentage" office:value="0.160395" calcext:value-type="percentage">
            <text:p>16.04%</text:p>
          </table:table-cell>
          <table:table-cell table:style-name="ce4" office:value-type="percentage" office:value="0.000108" calcext:value-type="percentage">
            <text:p>0.01%</text:p>
          </table:table-cell>
          <table:table-cell table:style-name="ce4" office:value-type="percentage" office:value="0.073018" calcext:value-type="percentage">
            <text:p>7.30%</text:p>
          </table:table-cell>
          <table:table-cell table:style-name="ce6" office:value-type="percentage" office:value="0.000062" calcext:value-type="percentage">
            <text:p>0.006%</text:p>
          </table:table-cell>
          <table:table-cell table:style-name="ce4" office:value-type="percentage" office:value="0.561752" calcext:value-type="percentage">
            <text:p>56.18%</text:p>
          </table:table-cell>
          <table:table-cell table:style-name="ce4" office:value-type="percentage" office:value="0.000281" calcext:value-type="percentage">
            <text:p>0.03%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percentage" office:value="0.264701" calcext:value-type="percentage">
            <text:p>26.47%</text:p>
          </table:table-cell>
          <table:table-cell table:style-name="ce4" office:value-type="percentage" office:value="0.000154" calcext:value-type="percentage">
            <text:p>0.02%</text:p>
          </table:table-cell>
          <table:table-cell table:style-name="ce4" office:value-type="percentage" office:value="0.17531" calcext:value-type="percentage">
            <text:p>17.53%</text:p>
          </table:table-cell>
          <table:table-cell table:style-name="ce4" office:value-type="percentage" office:value="0.000118" calcext:value-type="percentage">
            <text:p>0.01%</text:p>
          </table:table-cell>
          <table:table-cell table:style-name="ce4" office:value-type="percentage" office:value="0.088102" calcext:value-type="percentage">
            <text:p>8.81%</text:p>
          </table:table-cell>
          <table:table-cell table:style-name="ce6" office:value-type="percentage" office:value="0.000075" calcext:value-type="percentage">
            <text:p>0.008%</text:p>
          </table:table-cell>
          <table:table-cell table:style-name="ce4" office:value-type="percentage" office:value="0.528114" calcext:value-type="percentage">
            <text:p>52.81%</text:p>
          </table:table-cell>
          <table:table-cell table:style-name="ce4" office:value-type="percentage" office:value="0.000264" calcext:value-type="percentage">
            <text:p>0.03%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percentage" office:value="0.221404" calcext:value-type="percentage">
            <text:p>22.14%</text:p>
          </table:table-cell>
          <table:table-cell table:style-name="ce4" office:value-type="percentage" office:value="0.000129" calcext:value-type="percentage">
            <text:p>0.01%</text:p>
          </table:table-cell>
          <table:table-cell table:style-name="ce4" office:value-type="percentage" office:value="0.187013" calcext:value-type="percentage">
            <text:p>18.70%</text:p>
          </table:table-cell>
          <table:table-cell table:style-name="ce4" office:value-type="percentage" office:value="0.000125" calcext:value-type="percentage">
            <text:p>0.01%</text:p>
          </table:table-cell>
          <table:table-cell table:style-name="ce4" office:value-type="percentage" office:value="0.101208" calcext:value-type="percentage">
            <text:p>10.12%</text:p>
          </table:table-cell>
          <table:table-cell table:style-name="ce6" office:value-type="percentage" office:value="0.000077" calcext:value-type="percentage">
            <text:p>0.008%</text:p>
          </table:table-cell>
          <table:table-cell table:style-name="ce4" office:value-type="percentage" office:value="0.509625" calcext:value-type="percentage">
            <text:p>50.96%</text:p>
          </table:table-cell>
          <table:table-cell table:style-name="ce4" office:value-type="percentage" office:value="0.000255" calcext:value-type="percentage">
            <text:p>0.03%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percentage" office:value="0.190703" calcext:value-type="percentage">
            <text:p>19.07%</text:p>
          </table:table-cell>
          <table:table-cell table:style-name="ce4" office:value-type="percentage" office:value="0.000111" calcext:value-type="percentage">
            <text:p>0.01%</text:p>
          </table:table-cell>
          <table:table-cell table:style-name="ce4" office:value-type="percentage" office:value="0.196872" calcext:value-type="percentage">
            <text:p>19.69%</text:p>
          </table:table-cell>
          <table:table-cell table:style-name="ce4" office:value-type="percentage" office:value="0.000132" calcext:value-type="percentage">
            <text:p>0.01%</text:p>
          </table:table-cell>
          <table:table-cell table:style-name="ce4" office:value-type="percentage" office:value="0.112526" calcext:value-type="percentage">
            <text:p>11.25%</text:p>
          </table:table-cell>
          <table:table-cell table:style-name="ce6" office:value-type="percentage" office:value="0.000086" calcext:value-type="percentage">
            <text:p>0.009%</text:p>
          </table:table-cell>
          <table:table-cell table:style-name="ce4" office:value-type="percentage" office:value="0.500101" calcext:value-type="percentage">
            <text:p>50.01%</text:p>
          </table:table-cell>
          <table:table-cell table:style-name="ce4" office:value-type="percentage" office:value="0.00025" calcext:value-type="percentage">
            <text:p>0.03%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percentage" office:value="0.168445" calcext:value-type="percentage">
            <text:p>16.84%</text:p>
          </table:table-cell>
          <table:table-cell table:style-name="ce4" office:value-type="percentage" office:value="0.000113" calcext:value-type="percentage">
            <text:p>0.01%</text:p>
          </table:table-cell>
          <table:table-cell table:style-name="ce4" office:value-type="percentage" office:value="0.205355" calcext:value-type="percentage">
            <text:p>20.54%</text:p>
          </table:table-cell>
          <table:table-cell table:style-name="ce4" office:value-type="percentage" office:value="0.000138" calcext:value-type="percentage">
            <text:p>0.01%</text:p>
          </table:table-cell>
          <table:table-cell table:style-name="ce4" office:value-type="percentage" office:value="0.122469" calcext:value-type="percentage">
            <text:p>12.25%</text:p>
          </table:table-cell>
          <table:table-cell table:style-name="ce6" office:value-type="percentage" office:value="0.000093" calcext:value-type="percentage">
            <text:p>0.009%</text:p>
          </table:table-cell>
          <table:table-cell table:style-name="ce4" office:value-type="percentage" office:value="0.496269" calcext:value-type="percentage">
            <text:p>49.63%</text:p>
          </table:table-cell>
          <table:table-cell table:style-name="ce4" office:value-type="percentage" office:value="0.000248" calcext:value-type="percentage">
            <text:p>0.02%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percentage" office:value="0.152193" calcext:value-type="percentage">
            <text:p>15.22%</text:p>
          </table:table-cell>
          <table:table-cell table:style-name="ce4" office:value-type="percentage" office:value="0.000102" calcext:value-type="percentage">
            <text:p>0.01%</text:p>
          </table:table-cell>
          <table:table-cell table:style-name="ce4" office:value-type="percentage" office:value="0.212313" calcext:value-type="percentage">
            <text:p>21.23%</text:p>
          </table:table-cell>
          <table:table-cell table:style-name="ce4" office:value-type="percentage" office:value="0.000142" calcext:value-type="percentage">
            <text:p>0.01%</text:p>
          </table:table-cell>
          <table:table-cell table:style-name="ce4" office:value-type="percentage" office:value="0.131236" calcext:value-type="percentage">
            <text:p>13.12%</text:p>
          </table:table-cell>
          <table:table-cell table:style-name="ce6" office:value-type="percentage" office:value="0.0001" calcext:value-type="percentage">
            <text:p>0.010%</text:p>
          </table:table-cell>
          <table:table-cell table:style-name="ce4" office:value-type="percentage" office:value="0.495742" calcext:value-type="percentage">
            <text:p>49.57%</text:p>
          </table:table-cell>
          <table:table-cell table:style-name="ce4" office:value-type="percentage" office:value="0.000248" calcext:value-type="percentage">
            <text:p>0.02%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percentage" office:value="0.140134" calcext:value-type="percentage">
            <text:p>14.01%</text:p>
          </table:table-cell>
          <table:table-cell table:style-name="ce4" office:value-type="percentage" office:value="0.000094" calcext:value-type="percentage">
            <text:p>0.01%</text:p>
          </table:table-cell>
          <table:table-cell table:style-name="ce4" office:value-type="percentage" office:value="0.218312" calcext:value-type="percentage">
            <text:p>21.83%</text:p>
          </table:table-cell>
          <table:table-cell table:style-name="ce4" office:value-type="percentage" office:value="0.000146" calcext:value-type="percentage">
            <text:p>0.01%</text:p>
          </table:table-cell>
          <table:table-cell table:style-name="ce4" office:value-type="percentage" office:value="0.138999" calcext:value-type="percentage">
            <text:p>13.90%</text:p>
          </table:table-cell>
          <table:table-cell table:style-name="ce6" office:value-type="percentage" office:value="0.000093" calcext:value-type="percentage">
            <text:p>0.009%</text:p>
          </table:table-cell>
          <table:table-cell table:style-name="ce4" office:value-type="percentage" office:value="0.497444" calcext:value-type="percentage">
            <text:p>49.74%</text:p>
          </table:table-cell>
          <table:table-cell table:style-name="ce4" office:value-type="percentage" office:value="0.000249" calcext:value-type="percentage">
            <text:p>0.02%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percentage" office:value="0.131306" calcext:value-type="percentage">
            <text:p>13.13%</text:p>
          </table:table-cell>
          <table:table-cell table:style-name="ce4" office:value-type="percentage" office:value="0.000088" calcext:value-type="percentage">
            <text:p>0.01%</text:p>
          </table:table-cell>
          <table:table-cell table:style-name="ce4" office:value-type="percentage" office:value="0.223377" calcext:value-type="percentage">
            <text:p>22.34%</text:p>
          </table:table-cell>
          <table:table-cell table:style-name="ce4" office:value-type="percentage" office:value="0.00015" calcext:value-type="percentage">
            <text:p>0.02%</text:p>
          </table:table-cell>
          <table:table-cell table:style-name="ce4" office:value-type="percentage" office:value="0.145975" calcext:value-type="percentage">
            <text:p>14.60%</text:p>
          </table:table-cell>
          <table:table-cell table:style-name="ce6" office:value-type="percentage" office:value="0.000098" calcext:value-type="percentage">
            <text:p>0.010%</text:p>
          </table:table-cell>
          <table:table-cell table:style-name="ce4" office:value-type="percentage" office:value="0.500658" calcext:value-type="percentage">
            <text:p>50.07%</text:p>
          </table:table-cell>
          <table:table-cell table:style-name="ce4" office:value-type="percentage" office:value="0.00025" calcext:value-type="percentage">
            <text:p>0.03%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percentage" office:value="0.119743" calcext:value-type="percentage">
            <text:p>11.97%</text:p>
          </table:table-cell>
          <table:table-cell table:style-name="ce4" office:value-type="percentage" office:value="0.000091" calcext:value-type="percentage">
            <text:p>0.01%</text:p>
          </table:table-cell>
          <table:table-cell table:style-name="ce4" office:value-type="percentage" office:value="0.232083" calcext:value-type="percentage">
            <text:p>23.21%</text:p>
          </table:table-cell>
          <table:table-cell table:style-name="ce4" office:value-type="percentage" office:value="0.000156" calcext:value-type="percentage">
            <text:p>0.02%</text:p>
          </table:table-cell>
          <table:table-cell table:style-name="ce4" office:value-type="percentage" office:value="0.157658" calcext:value-type="percentage">
            <text:p>15.77%</text:p>
          </table:table-cell>
          <table:table-cell table:style-name="ce6" office:value-type="percentage" office:value="0.000106" calcext:value-type="percentage">
            <text:p>0.011%</text:p>
          </table:table-cell>
          <table:table-cell table:style-name="ce4" office:value-type="percentage" office:value="0.509485" calcext:value-type="percentage">
            <text:p>50.95%</text:p>
          </table:table-cell>
          <table:table-cell table:style-name="ce4" office:value-type="percentage" office:value="0.000255" calcext:value-type="percentage">
            <text:p>0.03%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percentage" office:value="0.113243" calcext:value-type="percentage">
            <text:p>11.32%</text:p>
          </table:table-cell>
          <table:table-cell table:style-name="ce4" office:value-type="percentage" office:value="0.000086" calcext:value-type="percentage">
            <text:p>0.01%</text:p>
          </table:table-cell>
          <table:table-cell table:style-name="ce4" office:value-type="percentage" office:value="0.238817" calcext:value-type="percentage">
            <text:p>23.88%</text:p>
          </table:table-cell>
          <table:table-cell table:style-name="ce4" office:value-type="percentage" office:value="0.000139" calcext:value-type="percentage">
            <text:p>0.01%</text:p>
          </table:table-cell>
          <table:table-cell table:style-name="ce4" office:value-type="percentage" office:value="0.167077" calcext:value-type="percentage">
            <text:p>16.71%</text:p>
          </table:table-cell>
          <table:table-cell table:style-name="ce6" office:value-type="percentage" office:value="0.000112" calcext:value-type="percentage">
            <text:p>0.011%</text:p>
          </table:table-cell>
          <table:table-cell table:style-name="ce4" office:value-type="percentage" office:value="0.519136" calcext:value-type="percentage">
            <text:p>51.91%</text:p>
          </table:table-cell>
          <table:table-cell table:style-name="ce4" office:value-type="percentage" office:value="0.00026" calcext:value-type="percentage">
            <text:p>0.03%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percentage" office:value="0.109889" calcext:value-type="percentage">
            <text:p>10.99%</text:p>
          </table:table-cell>
          <table:table-cell table:style-name="ce4" office:value-type="percentage" office:value="0.000084" calcext:value-type="percentage">
            <text:p>0.01%</text:p>
          </table:table-cell>
          <table:table-cell table:style-name="ce4" office:value-type="percentage" office:value="0.244226" calcext:value-type="percentage">
            <text:p>24.42%</text:p>
          </table:table-cell>
          <table:table-cell table:style-name="ce4" office:value-type="percentage" office:value="0.000142" calcext:value-type="percentage">
            <text:p>0.01%</text:p>
          </table:table-cell>
          <table:table-cell table:style-name="ce4" office:value-type="percentage" office:value="0.17482" calcext:value-type="percentage">
            <text:p>17.48%</text:p>
          </table:table-cell>
          <table:table-cell table:style-name="ce6" office:value-type="percentage" office:value="0.000117" calcext:value-type="percentage">
            <text:p>0.012%</text:p>
          </table:table-cell>
          <table:table-cell table:style-name="ce4" office:value-type="percentage" office:value="0.528935" calcext:value-type="percentage">
            <text:p>52.89%</text:p>
          </table:table-cell>
          <table:table-cell table:style-name="ce4" office:value-type="percentage" office:value="0.000264" calcext:value-type="percentage">
            <text:p>0.03%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percentage" office:value="0.107209" calcext:value-type="percentage">
            <text:p>10.72%</text:p>
          </table:table-cell>
          <table:table-cell table:style-name="ce4" office:value-type="percentage" office:value="0.000082" calcext:value-type="percentage">
            <text:p>0.01%</text:p>
          </table:table-cell>
          <table:table-cell table:style-name="ce4" office:value-type="percentage" office:value="0.250695" calcext:value-type="percentage">
            <text:p>25.07%</text:p>
          </table:table-cell>
          <table:table-cell table:style-name="ce4" office:value-type="percentage" office:value="0.000146" calcext:value-type="percentage">
            <text:p>0.01%</text:p>
          </table:table-cell>
          <table:table-cell table:style-name="ce4" office:value-type="percentage" office:value="0.183997" calcext:value-type="percentage">
            <text:p>18.40%</text:p>
          </table:table-cell>
          <table:table-cell table:style-name="ce6" office:value-type="percentage" office:value="0.000123" calcext:value-type="percentage">
            <text:p>0.012%</text:p>
          </table:table-cell>
          <table:table-cell table:style-name="ce4" office:value-type="percentage" office:value="0.541901" calcext:value-type="percentage">
            <text:p>54.19%</text:p>
          </table:table-cell>
          <table:table-cell table:style-name="ce4" office:value-type="percentage" office:value="0.000271" calcext:value-type="percentage">
            <text:p>0.03%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percentage" office:value="0.106174" calcext:value-type="percentage">
            <text:p>10.62%</text:p>
          </table:table-cell>
          <table:table-cell table:style-name="ce4" office:value-type="percentage" office:value="0.000081" calcext:value-type="percentage">
            <text:p>0.01%</text:p>
          </table:table-cell>
          <table:table-cell table:style-name="ce4" office:value-type="percentage" office:value="0.25601" calcext:value-type="percentage">
            <text:p>25.60%</text:p>
          </table:table-cell>
          <table:table-cell table:style-name="ce4" office:value-type="percentage" office:value="0.000149" calcext:value-type="percentage">
            <text:p>0.01%</text:p>
          </table:table-cell>
          <table:table-cell table:style-name="ce4" office:value-type="percentage" office:value="0.190535" calcext:value-type="percentage">
            <text:p>19.05%</text:p>
          </table:table-cell>
          <table:table-cell table:style-name="ce6" office:value-type="percentage" office:value="0.000111" calcext:value-type="percentage">
            <text:p>0.011%</text:p>
          </table:table-cell>
          <table:table-cell table:style-name="ce4" office:value-type="percentage" office:value="0.552719" calcext:value-type="percentage">
            <text:p>55.27%</text:p>
          </table:table-cell>
          <table:table-cell table:style-name="ce4" office:value-type="percentage" office:value="0.000276" calcext:value-type="percentage">
            <text:p>0.03%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percentage" office:value="0.106082" calcext:value-type="percentage">
            <text:p>10.61%</text:p>
          </table:table-cell>
          <table:table-cell table:style-name="ce4" office:value-type="percentage" office:value="0.000081" calcext:value-type="percentage">
            <text:p>0.01%</text:p>
          </table:table-cell>
          <table:table-cell table:style-name="ce4" office:value-type="percentage" office:value="0.26002" calcext:value-type="percentage">
            <text:p>26.00%</text:p>
          </table:table-cell>
          <table:table-cell table:style-name="ce4" office:value-type="percentage" office:value="0.000152" calcext:value-type="percentage">
            <text:p>0.02%</text:p>
          </table:table-cell>
          <table:table-cell table:style-name="ce4" office:value-type="percentage" office:value="0.195749" calcext:value-type="percentage">
            <text:p>19.57%</text:p>
          </table:table-cell>
          <table:table-cell table:style-name="ce6" office:value-type="percentage" office:value="0.000114" calcext:value-type="percentage">
            <text:p>0.011%</text:p>
          </table:table-cell>
          <table:table-cell table:style-name="ce4" office:value-type="percentage" office:value="0.561851" calcext:value-type="percentage">
            <text:p>56.19%</text:p>
          </table:table-cell>
          <table:table-cell table:style-name="ce4" office:value-type="percentage" office:value="0.000281" calcext:value-type="percentage">
            <text:p>0.03%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percentage" office:value="0.106422" calcext:value-type="percentage">
            <text:p>10.64%</text:p>
          </table:table-cell>
          <table:table-cell table:style-name="ce4" office:value-type="percentage" office:value="0.000081" calcext:value-type="percentage">
            <text:p>0.01%</text:p>
          </table:table-cell>
          <table:table-cell table:style-name="ce4" office:value-type="percentage" office:value="0.264263" calcext:value-type="percentage">
            <text:p>26.43%</text:p>
          </table:table-cell>
          <table:table-cell table:style-name="ce4" office:value-type="percentage" office:value="0.000154" calcext:value-type="percentage">
            <text:p>0.02%</text:p>
          </table:table-cell>
          <table:table-cell table:style-name="ce4" office:value-type="percentage" office:value="0.200861" calcext:value-type="percentage">
            <text:p>20.09%</text:p>
          </table:table-cell>
          <table:table-cell table:style-name="ce6" office:value-type="percentage" office:value="0.000117" calcext:value-type="percentage">
            <text:p>0.012%</text:p>
          </table:table-cell>
          <table:table-cell table:style-name="ce4" office:value-type="percentage" office:value="0.571546" calcext:value-type="percentage">
            <text:p>57.15%</text:p>
          </table:table-cell>
          <table:table-cell table:style-name="ce4" office:value-type="percentage" office:value="0.000286" calcext:value-type="percentage">
            <text:p>0.03%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percentage" office:value="0.106654" calcext:value-type="percentage">
            <text:p>10.67%</text:p>
          </table:table-cell>
          <table:table-cell table:style-name="ce4" office:value-type="percentage" office:value="0.000081" calcext:value-type="percentage">
            <text:p>0.01%</text:p>
          </table:table-cell>
          <table:table-cell table:style-name="ce4" office:value-type="percentage" office:value="0.267626" calcext:value-type="percentage">
            <text:p>26.76%</text:p>
          </table:table-cell>
          <table:table-cell table:style-name="ce4" office:value-type="percentage" office:value="0.000156" calcext:value-type="percentage">
            <text:p>0.02%</text:p>
          </table:table-cell>
          <table:table-cell table:style-name="ce4" office:value-type="percentage" office:value="0.204354" calcext:value-type="percentage">
            <text:p>20.44%</text:p>
          </table:table-cell>
          <table:table-cell table:style-name="ce6" office:value-type="percentage" office:value="0.000119" calcext:value-type="percentage">
            <text:p>0.012%</text:p>
          </table:table-cell>
          <table:table-cell table:style-name="ce4" office:value-type="percentage" office:value="0.578634" calcext:value-type="percentage">
            <text:p>57.86%</text:p>
          </table:table-cell>
          <table:table-cell table:style-name="ce4" office:value-type="percentage" office:value="0.000289" calcext:value-type="percentage">
            <text:p>0.03%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percentage-style style:name="N132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 style:data-style-name="N2" text:time-value="13:40:39.73430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5-07T13:45:19.514553500</dc:date>
    <meta:editing-duration>PT16M6S</meta:editing-duration>
    <meta:editing-cycles>3</meta:editing-cycles>
    <meta:generator>LibreOffice/25.2.7.2$Windows_X86_64 LibreOffice_project/5cbfd1ab6520636bb5f7b99185aa69bd7456825d</meta:generator>
    <meta:document-statistic meta:table-count="1" meta:cell-count="486" meta:object-count="0"/>
  </office:meta>
</office:document-meta>
</file>